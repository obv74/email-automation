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Pictures/100000000000005000000050B53AD838CB123376.png" manifest:media-type="image/png"/>
  <manifest:file-entry manifest:full-path="Pictures/100000000000005000000050619D9736512D237D.jpg" manifest:media-type="image/jpeg"/>
  <manifest:file-entry manifest:full-path="Pictures/100000000000005000000050276884CD8BB0CFB9.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Montserrat" svg:font-family="Montserrat" style:font-family-generic="roman" style:font-pitch="variable"/>
    <style:font-face style:name="Roboto" svg:font-family="Robot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Montserrat1" svg:font-family="Montserrat"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875in"/>
    </style:style>
    <style:style style:name="Table1.B" style:family="table-column">
      <style:table-column-properties style:column-width="2.1701in"/>
    </style:style>
    <style:style style:name="Table1.C" style:family="table-column">
      <style:table-column-properties style:column-width="1.1667in"/>
    </style:style>
    <style:style style:name="Table1.D" style:family="table-column">
      <style:table-column-properties style:column-width="0.3007in"/>
    </style:style>
    <style:style style:name="Table1.E" style:family="table-column">
      <style:table-column-properties style:column-width="1.175in"/>
    </style:style>
    <style:style style:name="Table1.1" style:family="table-row">
      <style:table-row-properties style:min-row-height="0.5868in" fo:keep-together="auto"/>
    </style:style>
    <style:style style:name="Table1.A1" style:family="table-cell">
      <style:table-cell-properties style:vertical-align="" fo:padding="0.0694in" fo:border="0.75pt solid #cbcbcb"/>
    </style:style>
    <style:style style:name="Table1.2" style:family="table-row">
      <style:table-row-properties style:min-row-height="1.4826in" fo:keep-together="auto"/>
    </style:style>
    <style:style style:name="Table2" style:family="table">
      <style:table-properties style:width="1.6563in" fo:margin-left="0in" fo:margin-top="0in" fo:margin-bottom="0in" table:align="left" style:writing-mode="lr-tb"/>
    </style:style>
    <style:style style:name="Table2.A" style:family="table-column">
      <style:table-column-properties style:column-width="1.6563in"/>
    </style:style>
    <style:style style:name="Table2.1" style:family="table-row">
      <style:table-row-properties style:min-row-height="0.5347in" fo:keep-together="auto"/>
    </style:style>
    <style:style style:name="Table2.A1" style:family="table-cell">
      <style:table-cell-properties style:vertical-align="" fo:padding="0.0694in" fo:border="none"/>
    </style:style>
    <style:style style:name="Table3" style:family="table">
      <style:table-properties style:width="0.5139in" fo:margin-left="0in" fo:margin-top="0in" fo:margin-bottom="0in" table:align="left"/>
    </style:style>
    <style:style style:name="Table3.A" style:family="table-column">
      <style:table-column-properties style:column-width="0.5139in"/>
    </style:style>
    <style:style style:name="Table3.1" style:family="table-row">
      <style:table-row-properties style:min-row-height="0.3368in" fo:keep-together="auto"/>
    </style:style>
    <style:style style:name="Table3.A1" style:family="table-cell">
      <style:table-cell-properties style:vertical-align="" fo:padding="0.0694in" fo:border="none"/>
    </style:style>
    <style:style style:name="Table4" style:family="table">
      <style:table-properties style:width="4.4201in" fo:margin-left="0in" fo:margin-top="0in" fo:margin-bottom="0in" table:align="left"/>
    </style:style>
    <style:style style:name="Table4.A" style:family="table-column">
      <style:table-column-properties style:column-width="1.7944in"/>
    </style:style>
    <style:style style:name="Table4.B" style:family="table-column">
      <style:table-column-properties style:column-width="2.3472in"/>
    </style:style>
    <style:style style:name="Table4.C" style:family="table-column">
      <style:table-column-properties style:column-width="0.1389in"/>
    </style:style>
    <style:style style:name="Table4.1" style:family="table-row">
      <style:table-row-properties style:min-row-height="0.5764in" fo:keep-together="auto"/>
    </style:style>
    <style:style style:name="Table4.A1" style:family="table-cell">
      <style:table-cell-properties style:vertical-align="" fo:padding="0.0694in" fo:border="none"/>
    </style:style>
    <style:style style:name="Table4.2" style:family="table-row">
      <style:table-row-properties style:min-row-height="0.3785in" fo:keep-together="auto"/>
    </style:style>
    <style:style style:name="Table5" style:family="table">
      <style:table-properties style:width="3.991in" fo:margin-left="0in" fo:margin-top="0in" fo:margin-bottom="0in" table:align="left" style:writing-mode="lr-tb"/>
    </style:style>
    <style:style style:name="Table5.A" style:family="table-column">
      <style:table-column-properties style:column-width="3.991in"/>
    </style:style>
    <style:style style:name="Table5.1" style:family="table-row">
      <style:table-row-properties style:min-row-height="0.7431in" fo:keep-together="auto"/>
    </style:style>
    <style:style style:name="Table5.A1" style:family="table-cell">
      <style:table-cell-properties style:vertical-align="" fo:padding="0.0694in" fo:border="none"/>
    </style:style>
    <style:style style:name="Table6" style:family="table">
      <style:table-properties style:width="0.7951in" fo:margin-left="0in" fo:margin-top="0in" fo:margin-bottom="0in" table:align="left"/>
    </style:style>
    <style:style style:name="Table6.A" style:family="table-column">
      <style:table-column-properties style:column-width="0.7951in"/>
    </style:style>
    <style:style style:name="Table6.1" style:family="table-row">
      <style:table-row-properties style:min-row-height="0.3368in" fo:keep-together="auto"/>
    </style:style>
    <style:style style:name="Table6.A1" style:family="table-cell">
      <style:table-cell-properties style:vertical-align="" fo:padding="0.0694in" fo:border="none"/>
    </style:style>
    <style:style style:name="Table7" style:family="table">
      <style:table-properties style:width="6.5in" fo:margin-left="0in" fo:margin-top="0in" fo:margin-bottom="0in" table:align="left"/>
    </style:style>
    <style:style style:name="Table7.A" style:family="table-column">
      <style:table-column-properties style:column-width="4.3174in"/>
    </style:style>
    <style:style style:name="Table7.B" style:family="table-column">
      <style:table-column-properties style:column-width="1.9167in"/>
    </style:style>
    <style:style style:name="Table7.C" style:family="table-column">
      <style:table-column-properties style:column-width="0.1326in"/>
    </style:style>
    <style:style style:name="Table7.1" style:family="table-row">
      <style:table-row-properties style:min-row-height="0.7847in" fo:keep-together="auto"/>
    </style:style>
    <style:style style:name="Table7.A1" style:family="table-cell">
      <style:table-cell-properties style:vertical-align="" fo:padding="0.0694in" fo:border="none"/>
    </style:style>
    <style:style style:name="Table7.2" style:family="table-row">
      <style:table-row-properties style:min-row-height="0.3785in" fo:keep-together="auto"/>
    </style:style>
    <style:style style:name="Table8" style:family="table">
      <style:table-properties style:width="1.6563in" fo:margin-left="0in" fo:margin-top="0in" fo:margin-bottom="0in" table:align="left" style:writing-mode="lr-tb"/>
    </style:style>
    <style:style style:name="Table8.A" style:family="table-column">
      <style:table-column-properties style:column-width="1.6563in"/>
    </style:style>
    <style:style style:name="Table8.1" style:family="table-row">
      <style:table-row-properties style:min-row-height="0.5347in" fo:keep-together="auto"/>
    </style:style>
    <style:style style:name="Table8.A1" style:family="table-cell">
      <style:table-cell-properties style:vertical-align="" fo:padding="0.0694in" fo:border="none"/>
    </style:style>
    <style:style style:name="Table9" style:family="table">
      <style:table-properties style:width="0.5139in" fo:margin-left="0in" fo:margin-top="0in" fo:margin-bottom="0in" table:align="left"/>
    </style:style>
    <style:style style:name="Table9.A" style:family="table-column">
      <style:table-column-properties style:column-width="0.5139in"/>
    </style:style>
    <style:style style:name="Table9.1" style:family="table-row">
      <style:table-row-properties style:min-row-height="0.3368in" fo:keep-together="auto"/>
    </style:style>
    <style:style style:name="Table9.A1" style:family="table-cell">
      <style:table-cell-properties style:vertical-align="" fo:padding="0.0694in" fo:border="none"/>
    </style:style>
    <style:style style:name="Table10" style:family="table">
      <style:table-properties style:width="4.3889in" fo:margin-left="0in" fo:margin-top="0in" fo:margin-bottom="0in" table:align="left"/>
    </style:style>
    <style:style style:name="Table10.A" style:family="table-column">
      <style:table-column-properties style:column-width="1.7944in"/>
    </style:style>
    <style:style style:name="Table10.B" style:family="table-column">
      <style:table-column-properties style:column-width="2.316in"/>
    </style:style>
    <style:style style:name="Table10.C" style:family="table-column">
      <style:table-column-properties style:column-width="0.1396in"/>
    </style:style>
    <style:style style:name="Table10.D" style:family="table-column">
      <style:table-column-properties style:column-width="0.1382in"/>
    </style:style>
    <style:style style:name="Table10.1" style:family="table-row">
      <style:table-row-properties style:min-row-height="0.5764in" fo:keep-together="auto"/>
    </style:style>
    <style:style style:name="Table10.A1" style:family="table-cell">
      <style:table-cell-properties style:vertical-align="" fo:padding="0.0694in" fo:border="none"/>
    </style:style>
    <style:style style:name="Table10.2" style:family="table-row">
      <style:table-row-properties style:min-row-height="0.3785in" fo:keep-together="auto"/>
    </style:style>
    <style:style style:name="Table11" style:family="table">
      <style:table-properties style:width="1.6563in" fo:margin-left="0in" fo:margin-top="0in" fo:margin-bottom="0in" table:align="left" style:writing-mode="lr-tb"/>
    </style:style>
    <style:style style:name="Table11.A" style:family="table-column">
      <style:table-column-properties style:column-width="1.6563in"/>
    </style:style>
    <style:style style:name="Table11.1" style:family="table-row">
      <style:table-row-properties style:min-row-height="0.5347in" fo:keep-together="auto"/>
    </style:style>
    <style:style style:name="Table11.A1" style:family="table-cell">
      <style:table-cell-properties style:vertical-align="" fo:padding="0.0694in" fo:border="none"/>
    </style:style>
    <style:style style:name="Table12" style:family="table">
      <style:table-properties style:width="0.5139in" fo:margin-left="0in" fo:margin-top="0in" fo:margin-bottom="0in" table:align="left"/>
    </style:style>
    <style:style style:name="Table12.A" style:family="table-column">
      <style:table-column-properties style:column-width="0.5139in"/>
    </style:style>
    <style:style style:name="Table12.1" style:family="table-row">
      <style:table-row-properties style:min-row-height="0.3368in" fo:keep-together="auto"/>
    </style:style>
    <style:style style:name="Table12.A1" style:family="table-cell">
      <style:table-cell-properties style:vertical-align="" fo:padding="0.0694in" fo:border="none"/>
    </style:style>
    <style:style style:name="Table13" style:family="table">
      <style:table-properties style:width="4.3889in" fo:margin-left="0in" fo:margin-top="0in" fo:margin-bottom="0in" table:align="left"/>
    </style:style>
    <style:style style:name="Table13.A" style:family="table-column">
      <style:table-column-properties style:column-width="1.7944in"/>
    </style:style>
    <style:style style:name="Table13.B" style:family="table-column">
      <style:table-column-properties style:column-width="2.316in"/>
    </style:style>
    <style:style style:name="Table13.C" style:family="table-column">
      <style:table-column-properties style:column-width="0.1396in"/>
    </style:style>
    <style:style style:name="Table13.D" style:family="table-column">
      <style:table-column-properties style:column-width="0.1382in"/>
    </style:style>
    <style:style style:name="Table13.1" style:family="table-row">
      <style:table-row-properties style:min-row-height="0.5764in" fo:keep-together="auto"/>
    </style:style>
    <style:style style:name="Table13.A1" style:family="table-cell">
      <style:table-cell-properties style:vertical-align="" fo:padding="0.0694in" fo:border="none"/>
    </style:style>
    <style:style style:name="Table13.2" style:family="table-row">
      <style:table-row-properties style:min-row-height="0.3785in" fo:keep-together="auto"/>
    </style:style>
    <style:style style:name="Table14" style:family="table">
      <style:table-properties style:width="3.9722in" fo:margin-left="0in" fo:margin-top="0in" fo:margin-bottom="0in" table:align="left" style:writing-mode="lr-tb"/>
    </style:style>
    <style:style style:name="Table14.A" style:family="table-column">
      <style:table-column-properties style:column-width="3.9722in"/>
    </style:style>
    <style:style style:name="Table14.1" style:family="table-row">
      <style:table-row-properties style:min-row-height="0.7431in" fo:keep-together="auto"/>
    </style:style>
    <style:style style:name="Table14.A1" style:family="table-cell">
      <style:table-cell-properties style:vertical-align="" fo:padding="0.0694in" fo:border="none"/>
    </style:style>
    <style:style style:name="Table15" style:family="table">
      <style:table-properties style:width="0.7951in" fo:margin-left="0in" fo:margin-top="0in" fo:margin-bottom="0in" table:align="left"/>
    </style:style>
    <style:style style:name="Table15.A" style:family="table-column">
      <style:table-column-properties style:column-width="0.7951in"/>
    </style:style>
    <style:style style:name="Table15.1" style:family="table-row">
      <style:table-row-properties style:min-row-height="0.3368in" fo:keep-together="auto"/>
    </style:style>
    <style:style style:name="Table15.A1" style:family="table-cell">
      <style:table-cell-properties style:vertical-align="" fo:padding="0.0694in" fo:border="none"/>
    </style:style>
    <style:style style:name="Table16" style:family="table">
      <style:table-properties style:width="6.5in" fo:margin-left="0in" fo:margin-top="0in" fo:margin-bottom="0in" table:align="left"/>
    </style:style>
    <style:style style:name="Table16.A" style:family="table-column">
      <style:table-column-properties style:column-width="4.2972in"/>
    </style:style>
    <style:style style:name="Table16.B" style:family="table-column">
      <style:table-column-properties style:column-width="1.9368in"/>
    </style:style>
    <style:style style:name="Table16.C" style:family="table-column">
      <style:table-column-properties style:column-width="0.1326in"/>
    </style:style>
    <style:style style:name="Table16.1" style:family="table-row">
      <style:table-row-properties style:min-row-height="0.7847in" fo:keep-together="auto"/>
    </style:style>
    <style:style style:name="Table16.A1" style:family="table-cell">
      <style:table-cell-properties style:vertical-align="" fo:padding="0.0694in" fo:border="none"/>
    </style:style>
    <style:style style:name="Table16.2" style:family="table-row">
      <style:table-row-properties style:min-row-height="0.3785in" fo:keep-together="auto"/>
    </style:style>
    <style:style style:name="Table17" style:family="table">
      <style:table-properties style:width="1.6563in" fo:margin-left="0in" fo:margin-top="0in" fo:margin-bottom="0in" table:align="left" style:writing-mode="lr-tb"/>
    </style:style>
    <style:style style:name="Table17.A" style:family="table-column">
      <style:table-column-properties style:column-width="1.6563in"/>
    </style:style>
    <style:style style:name="Table17.1" style:family="table-row">
      <style:table-row-properties style:min-row-height="0.5347in" fo:keep-together="auto"/>
    </style:style>
    <style:style style:name="Table17.A1" style:family="table-cell">
      <style:table-cell-properties style:vertical-align="" fo:padding="0.0694in" fo:border="none"/>
    </style:style>
    <style:style style:name="Table18" style:family="table">
      <style:table-properties style:width="0.5139in" fo:margin-left="0in" fo:margin-top="0in" fo:margin-bottom="0in" table:align="left"/>
    </style:style>
    <style:style style:name="Table18.A" style:family="table-column">
      <style:table-column-properties style:column-width="0.5139in"/>
    </style:style>
    <style:style style:name="Table18.1" style:family="table-row">
      <style:table-row-properties style:min-row-height="0.3368in" fo:keep-together="auto"/>
    </style:style>
    <style:style style:name="Table18.A1" style:family="table-cell">
      <style:table-cell-properties style:vertical-align="" fo:padding="0.0694in" fo:border="none"/>
    </style:style>
    <style:style style:name="Table19" style:family="table">
      <style:table-properties style:width="4.441in" fo:margin-left="0in" fo:margin-top="0in" fo:margin-bottom="0in" table:align="left"/>
    </style:style>
    <style:style style:name="Table19.A" style:family="table-column">
      <style:table-column-properties style:column-width="1.7944in"/>
    </style:style>
    <style:style style:name="Table19.B" style:family="table-column">
      <style:table-column-properties style:column-width="2.3681in"/>
    </style:style>
    <style:style style:name="Table19.C" style:family="table-column">
      <style:table-column-properties style:column-width="0.1389in"/>
    </style:style>
    <style:style style:name="Table19.1" style:family="table-row">
      <style:table-row-properties style:min-row-height="0.5764in" fo:keep-together="auto"/>
    </style:style>
    <style:style style:name="Table19.A1" style:family="table-cell">
      <style:table-cell-properties style:vertical-align="" fo:padding="0.0694in" fo:border="none"/>
    </style:style>
    <style:style style:name="Table19.2" style:family="table-row">
      <style:table-row-properties style:min-row-height="0.3785in" fo:keep-together="auto"/>
    </style:style>
    <style:style style:name="Table20" style:family="table">
      <style:table-properties style:width="4.0292in" fo:margin-left="0in" fo:margin-top="0in" fo:margin-bottom="0in" table:align="left" style:writing-mode="lr-tb"/>
    </style:style>
    <style:style style:name="Table20.A" style:family="table-column">
      <style:table-column-properties style:column-width="4.0292in"/>
    </style:style>
    <style:style style:name="Table20.1" style:family="table-row">
      <style:table-row-properties style:min-row-height="0.7431in" fo:keep-together="auto"/>
    </style:style>
    <style:style style:name="Table20.A1" style:family="table-cell">
      <style:table-cell-properties style:vertical-align="" fo:padding="0.0694in" fo:border="none"/>
    </style:style>
    <style:style style:name="Table21" style:family="table">
      <style:table-properties style:width="0.7951in" fo:margin-left="0in" fo:margin-top="0in" fo:margin-bottom="0in" table:align="left"/>
    </style:style>
    <style:style style:name="Table21.A" style:family="table-column">
      <style:table-column-properties style:column-width="0.7951in"/>
    </style:style>
    <style:style style:name="Table21.1" style:family="table-row">
      <style:table-row-properties style:min-row-height="0.3368in" fo:keep-together="auto"/>
    </style:style>
    <style:style style:name="Table21.A1" style:family="table-cell">
      <style:table-cell-properties style:vertical-align="" fo:padding="0.0694in" fo:border="none"/>
    </style:style>
    <style:style style:name="Table22" style:family="table">
      <style:table-properties style:width="6.5in" fo:margin-left="0in" fo:margin-top="0in" fo:margin-bottom="0in" table:align="left"/>
    </style:style>
    <style:style style:name="Table22.A" style:family="table-column">
      <style:table-column-properties style:column-width="4.3576in"/>
    </style:style>
    <style:style style:name="Table22.B" style:family="table-column">
      <style:table-column-properties style:column-width="1.8771in"/>
    </style:style>
    <style:style style:name="Table22.C" style:family="table-column">
      <style:table-column-properties style:column-width="0.1326in"/>
    </style:style>
    <style:style style:name="Table22.D" style:family="table-column">
      <style:table-column-properties style:column-width="0.1319in"/>
    </style:style>
    <style:style style:name="Table22.1" style:family="table-row">
      <style:table-row-properties style:min-row-height="0.7847in" fo:keep-together="auto"/>
    </style:style>
    <style:style style:name="Table22.A1" style:family="table-cell">
      <style:table-cell-properties style:vertical-align="" fo:padding="0.0694in" fo:border="none"/>
    </style:style>
    <style:style style:name="Table22.2" style:family="table-row">
      <style:table-row-properties style:min-row-height="0.3785in" fo:keep-together="auto"/>
    </style:style>
    <style:style style:name="Table23" style:family="table">
      <style:table-properties style:width="4.0194in" fo:margin-left="0in" fo:margin-top="0in" fo:margin-bottom="0in" table:align="left" style:writing-mode="lr-tb"/>
    </style:style>
    <style:style style:name="Table23.A" style:family="table-column">
      <style:table-column-properties style:column-width="4.0194in"/>
    </style:style>
    <style:style style:name="Table23.1" style:family="table-row">
      <style:table-row-properties style:min-row-height="0.7431in" fo:keep-together="auto"/>
    </style:style>
    <style:style style:name="Table23.A1" style:family="table-cell">
      <style:table-cell-properties style:vertical-align="" fo:padding="0.0694in" fo:border="none"/>
    </style:style>
    <style:style style:name="Table24" style:family="table">
      <style:table-properties style:width="1.1285in" fo:margin-left="0in" fo:margin-top="0in" fo:margin-bottom="0in" table:align="left"/>
    </style:style>
    <style:style style:name="Table24.A" style:family="table-column">
      <style:table-column-properties style:column-width="1.1285in"/>
    </style:style>
    <style:style style:name="Table24.1" style:family="table-row">
      <style:table-row-properties style:min-row-height="0.3368in" fo:keep-together="auto"/>
    </style:style>
    <style:style style:name="Table24.A1" style:family="table-cell">
      <style:table-cell-properties style:vertical-align="" fo:padding="0.0694in" fo:border="none"/>
    </style:style>
    <style:style style:name="Table25" style:family="table">
      <style:table-properties style:width="6.5in" fo:margin-left="0in" fo:margin-top="0in" fo:margin-bottom="0in" table:align="left"/>
    </style:style>
    <style:style style:name="Table25.A" style:family="table-column">
      <style:table-column-properties style:column-width="4.3472in"/>
    </style:style>
    <style:style style:name="Table25.B" style:family="table-column">
      <style:table-column-properties style:column-width="1.8868in"/>
    </style:style>
    <style:style style:name="Table25.C" style:family="table-column">
      <style:table-column-properties style:column-width="0.1326in"/>
    </style:style>
    <style:style style:name="Table25.1" style:family="table-row">
      <style:table-row-properties style:min-row-height="0.7847in" fo:keep-together="auto"/>
    </style:style>
    <style:style style:name="Table25.A1" style:family="table-cell">
      <style:table-cell-properties style:vertical-align="" fo:padding="0.0694in" fo:border="none"/>
    </style:style>
    <style:style style:name="Table25.2" style:family="table-row">
      <style:table-row-properties style:min-row-height="0.3785in" fo:keep-together="auto"/>
    </style:style>
    <style:style style:name="Table26" style:family="table">
      <style:table-properties style:width="6.5in" fo:margin-left="0in" fo:margin-top="0in" fo:margin-bottom="0in" table:align="left"/>
    </style:style>
    <style:style style:name="Table26.A" style:family="table-column">
      <style:table-column-properties style:column-width="1.6875in"/>
    </style:style>
    <style:style style:name="Table26.B" style:family="table-column">
      <style:table-column-properties style:column-width="2.1701in"/>
    </style:style>
    <style:style style:name="Table26.C" style:family="table-column">
      <style:table-column-properties style:column-width="1.1667in"/>
    </style:style>
    <style:style style:name="Table26.D" style:family="table-column">
      <style:table-column-properties style:column-width="0.3007in"/>
    </style:style>
    <style:style style:name="Table26.E" style:family="table-column">
      <style:table-column-properties style:column-width="1.175in"/>
    </style:style>
    <style:style style:name="Table26.1" style:family="table-row">
      <style:table-row-properties style:min-row-height="0.5868in" fo:keep-together="auto"/>
    </style:style>
    <style:style style:name="Table26.A1" style:family="table-cell">
      <style:table-cell-properties style:vertical-align="" fo:padding="0.0694in" fo:border="0.75pt solid #cbcbcb"/>
    </style:style>
    <style:style style:name="Table26.2" style:family="table-row">
      <style:table-row-properties style:min-row-height="1.4826in" fo:keep-together="auto"/>
    </style:style>
    <style:style style:name="Table27" style:family="table">
      <style:table-properties style:width="4.0479in" fo:margin-left="0in" fo:margin-top="0in" fo:margin-bottom="0in" table:align="left" style:writing-mode="lr-tb"/>
    </style:style>
    <style:style style:name="Table27.A" style:family="table-column">
      <style:table-column-properties style:column-width="4.0479in"/>
    </style:style>
    <style:style style:name="Table27.1" style:family="table-row">
      <style:table-row-properties style:min-row-height="0.7431in" fo:keep-together="auto"/>
    </style:style>
    <style:style style:name="Table27.A1" style:family="table-cell">
      <style:table-cell-properties style:vertical-align="" fo:padding="0.0694in" fo:border="none"/>
    </style:style>
    <style:style style:name="Table28" style:family="table">
      <style:table-properties style:width="1.1285in" fo:margin-left="0in" fo:margin-top="0in" fo:margin-bottom="0in" table:align="left"/>
    </style:style>
    <style:style style:name="Table28.A" style:family="table-column">
      <style:table-column-properties style:column-width="1.1285in"/>
    </style:style>
    <style:style style:name="Table28.1" style:family="table-row">
      <style:table-row-properties style:min-row-height="0.3368in" fo:keep-together="auto"/>
    </style:style>
    <style:style style:name="Table28.A1" style:family="table-cell">
      <style:table-cell-properties style:vertical-align="" fo:padding="0.0694in" fo:border="none"/>
    </style:style>
    <style:style style:name="Table29" style:family="table">
      <style:table-properties style:width="6.5in" fo:margin-left="0in" fo:margin-top="0in" fo:margin-bottom="0in" table:align="left"/>
    </style:style>
    <style:style style:name="Table29.A" style:family="table-column">
      <style:table-column-properties style:column-width="4.3771in"/>
    </style:style>
    <style:style style:name="Table29.B" style:family="table-column">
      <style:table-column-properties style:column-width="1.8569in"/>
    </style:style>
    <style:style style:name="Table29.C" style:family="table-column">
      <style:table-column-properties style:column-width="0.1326in"/>
    </style:style>
    <style:style style:name="Table29.1" style:family="table-row">
      <style:table-row-properties style:min-row-height="0.7847in" fo:keep-together="auto"/>
    </style:style>
    <style:style style:name="Table29.A1" style:family="table-cell">
      <style:table-cell-properties style:vertical-align="" fo:padding="0.0694in" fo:border="none"/>
    </style:style>
    <style:style style:name="Table29.2" style:family="table-row">
      <style:table-row-properties style:min-row-height="0.3785in" fo:keep-together="auto"/>
    </style:style>
    <style:style style:name="Table30" style:family="table">
      <style:table-properties style:width="1.1667in" fo:margin-left="0in" fo:margin-top="0in" fo:margin-bottom="0in" table:align="left" style:writing-mode="lr-tb"/>
    </style:style>
    <style:style style:name="Table30.A" style:family="table-column">
      <style:table-column-properties style:column-width="1.1667in"/>
    </style:style>
    <style:style style:name="Table30.1" style:family="table-row">
      <style:table-row-properties style:min-row-height="0.5347in" fo:keep-together="auto"/>
    </style:style>
    <style:style style:name="Table30.A1" style:family="table-cell">
      <style:table-cell-properties style:vertical-align="" fo:padding="0.0694in" fo:border="none"/>
    </style:style>
    <style:style style:name="Table31" style:family="table">
      <style:table-properties style:width="0.5139in" fo:margin-left="0in" fo:margin-top="0in" fo:margin-bottom="0in" table:align="left"/>
    </style:style>
    <style:style style:name="Table31.A" style:family="table-column">
      <style:table-column-properties style:column-width="0.5139in"/>
    </style:style>
    <style:style style:name="Table31.1" style:family="table-row">
      <style:table-row-properties style:min-row-height="0.3368in" fo:keep-together="auto"/>
    </style:style>
    <style:style style:name="Table31.A1" style:family="table-cell">
      <style:table-cell-properties style:vertical-align="" fo:padding="0.0694in" fo:border="none"/>
    </style:style>
    <style:style style:name="Table32" style:family="table">
      <style:table-properties style:width="3.8993in" fo:margin-left="0in" fo:margin-top="0in" fo:margin-bottom="0in" table:align="left"/>
    </style:style>
    <style:style style:name="Table32.A" style:family="table-column">
      <style:table-column-properties style:column-width="1.3049in"/>
    </style:style>
    <style:style style:name="Table32.B" style:family="table-column">
      <style:table-column-properties style:column-width="2.316in"/>
    </style:style>
    <style:style style:name="Table32.C" style:family="table-column">
      <style:table-column-properties style:column-width="0.1389in"/>
    </style:style>
    <style:style style:name="Table32.1" style:family="table-row">
      <style:table-row-properties style:min-row-height="0.5764in" fo:keep-together="auto"/>
    </style:style>
    <style:style style:name="Table32.A1" style:family="table-cell">
      <style:table-cell-properties style:vertical-align="" fo:padding="0.0694in" fo:border="none"/>
    </style:style>
    <style:style style:name="Table32.2" style:family="table-row">
      <style:table-row-properties style:min-row-height="0.3785in" fo:keep-together="auto"/>
    </style:style>
    <style:style style:name="Table33" style:family="table">
      <style:table-properties style:width="4.0479in" fo:margin-left="0in" fo:margin-top="0in" fo:margin-bottom="0in" table:align="left" style:writing-mode="lr-tb"/>
    </style:style>
    <style:style style:name="Table33.A" style:family="table-column">
      <style:table-column-properties style:column-width="4.0479in"/>
    </style:style>
    <style:style style:name="Table33.1" style:family="table-row">
      <style:table-row-properties style:min-row-height="0.7431in" fo:keep-together="auto"/>
    </style:style>
    <style:style style:name="Table33.A1" style:family="table-cell">
      <style:table-cell-properties style:vertical-align="" fo:padding="0.0694in" fo:border="none"/>
    </style:style>
    <style:style style:name="Table34" style:family="table">
      <style:table-properties style:width="0.6701in" fo:margin-left="0in" fo:margin-top="0in" fo:margin-bottom="0in" table:align="left"/>
    </style:style>
    <style:style style:name="Table34.A" style:family="table-column">
      <style:table-column-properties style:column-width="0.6701in"/>
    </style:style>
    <style:style style:name="Table34.1" style:family="table-row">
      <style:table-row-properties style:min-row-height="0.3368in" fo:keep-together="auto"/>
    </style:style>
    <style:style style:name="Table34.A1" style:family="table-cell">
      <style:table-cell-properties style:vertical-align="" fo:padding="0.0694in" fo:border="none"/>
    </style:style>
    <style:style style:name="Table35" style:family="table">
      <style:table-properties style:width="6.5in" fo:margin-left="0in" fo:margin-top="0in" fo:margin-bottom="0in" table:align="left"/>
    </style:style>
    <style:style style:name="Table35.A" style:family="table-column">
      <style:table-column-properties style:column-width="4.3771in"/>
    </style:style>
    <style:style style:name="Table35.B" style:family="table-column">
      <style:table-column-properties style:column-width="1.8569in"/>
    </style:style>
    <style:style style:name="Table35.C" style:family="table-column">
      <style:table-column-properties style:column-width="0.1326in"/>
    </style:style>
    <style:style style:name="Table35.1" style:family="table-row">
      <style:table-row-properties style:min-row-height="0.7847in" fo:keep-together="auto"/>
    </style:style>
    <style:style style:name="Table35.A1" style:family="table-cell">
      <style:table-cell-properties style:vertical-align="" fo:padding="0.0694in" fo:border="none"/>
    </style:style>
    <style:style style:name="Table35.2" style:family="table-row">
      <style:table-row-properties style:min-row-height="0.3785in" fo:keep-together="auto"/>
    </style:style>
    <style:style style:name="Table36" style:family="table">
      <style:table-properties style:width="3.9722in" fo:margin-left="0in" fo:margin-top="0in" fo:margin-bottom="0in" table:align="left" style:writing-mode="lr-tb"/>
    </style:style>
    <style:style style:name="Table36.A" style:family="table-column">
      <style:table-column-properties style:column-width="3.9722in"/>
    </style:style>
    <style:style style:name="Table36.1" style:family="table-row">
      <style:table-row-properties style:min-row-height="0.7431in" fo:keep-together="auto"/>
    </style:style>
    <style:style style:name="Table36.A1" style:family="table-cell">
      <style:table-cell-properties style:vertical-align="" fo:padding="0.0694in" fo:border="none"/>
    </style:style>
    <style:style style:name="Table37" style:family="table">
      <style:table-properties style:width="0.6701in" fo:margin-left="0in" fo:margin-top="0in" fo:margin-bottom="0in" table:align="left"/>
    </style:style>
    <style:style style:name="Table37.A" style:family="table-column">
      <style:table-column-properties style:column-width="0.6701in"/>
    </style:style>
    <style:style style:name="Table37.1" style:family="table-row">
      <style:table-row-properties style:min-row-height="0.3368in" fo:keep-together="auto"/>
    </style:style>
    <style:style style:name="Table37.A1" style:family="table-cell">
      <style:table-cell-properties style:vertical-align="" fo:padding="0.0694in" fo:border="none"/>
    </style:style>
    <style:style style:name="Table38" style:family="table">
      <style:table-properties style:width="6.5in" fo:margin-left="0in" fo:margin-top="0in" fo:margin-bottom="0in" table:align="left"/>
    </style:style>
    <style:style style:name="Table38.A" style:family="table-column">
      <style:table-column-properties style:column-width="4.2972in"/>
    </style:style>
    <style:style style:name="Table38.B" style:family="table-column">
      <style:table-column-properties style:column-width="1.9368in"/>
    </style:style>
    <style:style style:name="Table38.C" style:family="table-column">
      <style:table-column-properties style:column-width="0.1326in"/>
    </style:style>
    <style:style style:name="Table38.1" style:family="table-row">
      <style:table-row-properties style:min-row-height="0.7847in" fo:keep-together="auto"/>
    </style:style>
    <style:style style:name="Table38.A1" style:family="table-cell">
      <style:table-cell-properties style:vertical-align="" fo:padding="0.0694in" fo:border="none"/>
    </style:style>
    <style:style style:name="Table38.2" style:family="table-row">
      <style:table-row-properties style:min-row-height="0.3785in" fo:keep-together="auto"/>
    </style:style>
    <style:style style:name="Table39" style:family="table">
      <style:table-properties style:width="1.1667in" fo:margin-left="0in" fo:margin-top="0in" fo:margin-bottom="0in" table:align="left" style:writing-mode="lr-tb"/>
    </style:style>
    <style:style style:name="Table39.A" style:family="table-column">
      <style:table-column-properties style:column-width="1.1667in"/>
    </style:style>
    <style:style style:name="Table39.1" style:family="table-row">
      <style:table-row-properties style:min-row-height="0.5347in" fo:keep-together="auto"/>
    </style:style>
    <style:style style:name="Table39.A1" style:family="table-cell">
      <style:table-cell-properties style:vertical-align="" fo:padding="0.0694in" fo:border="none"/>
    </style:style>
    <style:style style:name="Table40" style:family="table">
      <style:table-properties style:width="0.5139in" fo:margin-left="0in" fo:margin-top="0in" fo:margin-bottom="0in" table:align="left"/>
    </style:style>
    <style:style style:name="Table40.A" style:family="table-column">
      <style:table-column-properties style:column-width="0.5139in"/>
    </style:style>
    <style:style style:name="Table40.1" style:family="table-row">
      <style:table-row-properties style:min-row-height="0.3368in" fo:keep-together="auto"/>
    </style:style>
    <style:style style:name="Table40.A1" style:family="table-cell">
      <style:table-cell-properties style:vertical-align="" fo:padding="0.0694in" fo:border="none"/>
    </style:style>
    <style:style style:name="Table41" style:family="table">
      <style:table-properties style:width="4.0347in" fo:margin-left="0in" fo:margin-top="0in" fo:margin-bottom="0in" table:align="left"/>
    </style:style>
    <style:style style:name="Table41.A" style:family="table-column">
      <style:table-column-properties style:column-width="1.3049in"/>
    </style:style>
    <style:style style:name="Table41.B" style:family="table-column">
      <style:table-column-properties style:column-width="2.4514in"/>
    </style:style>
    <style:style style:name="Table41.C" style:family="table-column">
      <style:table-column-properties style:column-width="0.1389in"/>
    </style:style>
    <style:style style:name="Table41.1" style:family="table-row">
      <style:table-row-properties style:min-row-height="0.5764in" fo:keep-together="auto"/>
    </style:style>
    <style:style style:name="Table41.A1" style:family="table-cell">
      <style:table-cell-properties style:vertical-align="" fo:padding="0.0694in" fo:border="none"/>
    </style:style>
    <style:style style:name="Table41.2" style:family="table-row">
      <style:table-row-properties style:min-row-height="0.3785in" fo:keep-together="auto"/>
    </style:style>
    <style:style style:name="Table42" style:family="table">
      <style:table-properties style:width="4.0292in" fo:margin-left="0in" fo:margin-top="0in" fo:margin-bottom="0in" table:align="left" style:writing-mode="lr-tb"/>
    </style:style>
    <style:style style:name="Table42.A" style:family="table-column">
      <style:table-column-properties style:column-width="4.0292in"/>
    </style:style>
    <style:style style:name="Table42.1" style:family="table-row">
      <style:table-row-properties style:min-row-height="0.7431in" fo:keep-together="auto"/>
    </style:style>
    <style:style style:name="Table42.A1" style:family="table-cell">
      <style:table-cell-properties style:vertical-align="" fo:padding="0.0694in" fo:border="none"/>
    </style:style>
    <style:style style:name="Table43" style:family="table">
      <style:table-properties style:width="0.6701in" fo:margin-left="0in" fo:margin-top="0in" fo:margin-bottom="0in" table:align="left"/>
    </style:style>
    <style:style style:name="Table43.A" style:family="table-column">
      <style:table-column-properties style:column-width="0.6701in"/>
    </style:style>
    <style:style style:name="Table43.1" style:family="table-row">
      <style:table-row-properties style:min-row-height="0.3368in" fo:keep-together="auto"/>
    </style:style>
    <style:style style:name="Table43.A1" style:family="table-cell">
      <style:table-cell-properties style:vertical-align="" fo:padding="0.0694in" fo:border="none"/>
    </style:style>
    <style:style style:name="Table44" style:family="table">
      <style:table-properties style:width="6.5in" fo:margin-left="0in" fo:margin-top="0in" fo:margin-bottom="0in" table:align="left"/>
    </style:style>
    <style:style style:name="Table44.A" style:family="table-column">
      <style:table-column-properties style:column-width="4.3576in"/>
    </style:style>
    <style:style style:name="Table44.B" style:family="table-column">
      <style:table-column-properties style:column-width="1.8771in"/>
    </style:style>
    <style:style style:name="Table44.C" style:family="table-column">
      <style:table-column-properties style:column-width="0.1326in"/>
    </style:style>
    <style:style style:name="Table44.D" style:family="table-column">
      <style:table-column-properties style:column-width="0.1319in"/>
    </style:style>
    <style:style style:name="Table44.1" style:family="table-row">
      <style:table-row-properties style:min-row-height="0.7847in" fo:keep-together="auto"/>
    </style:style>
    <style:style style:name="Table44.A1" style:family="table-cell">
      <style:table-cell-properties style:vertical-align="" fo:padding="0.0694in" fo:border="none"/>
    </style:style>
    <style:style style:name="Table44.2" style:family="table-row">
      <style:table-row-properties style:min-row-height="0.3785in" fo:keep-together="auto"/>
    </style:style>
    <style:style style:name="Table45" style:family="table">
      <style:table-properties style:width="4.2576in" fo:margin-left="0in" fo:margin-top="0in" fo:margin-bottom="0in" table:align="left" style:writing-mode="lr-tb"/>
    </style:style>
    <style:style style:name="Table45.A" style:family="table-column">
      <style:table-column-properties style:column-width="4.2576in"/>
    </style:style>
    <style:style style:name="Table45.1" style:family="table-row">
      <style:table-row-properties style:min-row-height="0.7431in" fo:keep-together="auto"/>
    </style:style>
    <style:style style:name="Table45.A1" style:family="table-cell">
      <style:table-cell-properties style:vertical-align="" fo:padding="0.0694in" fo:border="none"/>
    </style:style>
    <style:style style:name="Table46" style:family="table">
      <style:table-properties style:width="0.6701in" fo:margin-left="0in" fo:margin-top="0in" fo:margin-bottom="0in" table:align="left"/>
    </style:style>
    <style:style style:name="Table46.A" style:family="table-column">
      <style:table-column-properties style:column-width="0.6701in"/>
    </style:style>
    <style:style style:name="Table46.1" style:family="table-row">
      <style:table-row-properties style:min-row-height="0.3368in" fo:keep-together="auto"/>
    </style:style>
    <style:style style:name="Table46.A1" style:family="table-cell">
      <style:table-cell-properties style:vertical-align="" fo:padding="0.0694in" fo:border="none"/>
    </style:style>
    <style:style style:name="Table47" style:family="table">
      <style:table-properties style:width="6.5in" fo:margin-left="0in" fo:margin-top="0in" fo:margin-bottom="0in" table:align="left"/>
    </style:style>
    <style:style style:name="Table47.A" style:family="table-column">
      <style:table-column-properties style:column-width="4.5972in"/>
    </style:style>
    <style:style style:name="Table47.B" style:family="table-column">
      <style:table-column-properties style:column-width="1.6368in"/>
    </style:style>
    <style:style style:name="Table47.C" style:family="table-column">
      <style:table-column-properties style:column-width="0.1326in"/>
    </style:style>
    <style:style style:name="Table47.1" style:family="table-row">
      <style:table-row-properties style:min-row-height="0.7847in" fo:keep-together="auto"/>
    </style:style>
    <style:style style:name="Table47.A1" style:family="table-cell">
      <style:table-cell-properties style:vertical-align="" fo:padding="0.0694in" fo:border="none"/>
    </style:style>
    <style:style style:name="Table47.2" style:family="table-row">
      <style:table-row-properties style:min-row-height="0.3785in" fo:keep-together="auto"/>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style:font-name="Roboto" fo:font-size="12pt" style:font-name-asian="Roboto1" style:font-size-asian="12pt" style:font-name-complex="Roboto1" style:font-size-complex="12pt"/>
    </style:style>
    <style:style style:name="P4" style:family="paragraph" style:parent-style-name="Standard">
      <style:paragraph-properties fo:line-height="139%"/>
    </style:style>
    <style:style style:name="P5" style:family="paragraph" style:parent-style-name="Standard">
      <style:paragraph-properties fo:line-height="139%"/>
      <style:text-properties fo:color="#333333" fo:font-size="10.5pt" style:font-size-asian="10.5pt" style:font-size-complex="10.5pt"/>
    </style:style>
    <style:style style:name="P6" style:family="paragraph" style:parent-style-name="Standard">
      <style:text-properties fo:color="#1d2129" fo:font-size="9pt" style:font-size-asian="9pt" style:font-size-complex="9pt"/>
    </style:style>
    <style:style style:name="P7" style:family="paragraph" style:parent-style-name="Standard">
      <style:paragraph-properties fo:margin-left="0.5in" fo:margin-right="0in" fo:margin-top="0.0835in" fo:margin-bottom="0.2083in" loext:contextual-spacing="false" fo:line-height="100%" fo:text-indent="0in" style:auto-text-indent="false"/>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1" style:family="paragraph" style:parent-style-name="Standard">
      <style:paragraph-properties fo:margin-top="0.1665in" fo:margin-bottom="0.1665in" loext:contextual-spacing="false" fo:line-height="100%"/>
    </style:style>
    <style:style style:name="P32" style:family="paragraph" style:parent-style-name="Standard">
      <style:paragraph-properties fo:margin-top="0in" fo:margin-bottom="0.1528in" loext:contextual-spacing="false" fo:line-height="100%"/>
    </style:style>
    <style:style style:name="P33" style:family="paragraph" style:parent-style-name="Standard">
      <style:paragraph-properties fo:margin-top="0in" fo:margin-bottom="0.1528in" loext:contextual-spacing="false" fo:line-height="100%" fo:text-align="end" style:justify-single-word="false"/>
    </style:style>
    <style:style style:name="P34" style:family="paragraph" style:parent-style-name="Standard">
      <style:paragraph-properties fo:margin-top="0in" fo:margin-bottom="0.3193in" loext:contextual-spacing="false" fo:line-height="160%" fo:padding="0in" fo:border="none"/>
    </style:style>
    <style:style style:name="P35" style:family="paragraph" style:parent-style-name="Standard">
      <loext:graphic-properties draw:fill="solid" draw:fill-color="#ebebeb"/>
      <style:paragraph-properties fo:margin-left="0.1528in" fo:margin-right="0in" fo:margin-top="0in" fo:margin-bottom="0.4862in" loext:contextual-spacing="false" fo:line-height="100%" fo:text-align="center" style:justify-single-word="false" fo:text-indent="0in" style:auto-text-indent="false" fo:background-color="#ebebeb" fo:padding="0.0693in" fo:border="none"/>
    </style:style>
    <style:style style:name="P36" style:family="paragraph" style:parent-style-name="Standard">
      <style:paragraph-properties fo:margin-top="0in" fo:margin-bottom="0.1665in" loext:contextual-spacing="false" fo:line-height="160%" fo:padding="0in" fo:border="none"/>
    </style:style>
    <style:style style:name="P37"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40"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41"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42"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43"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44"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45" style:family="paragraph" style:parent-style-name="Standard">
      <style:paragraph-properties fo:margin-top="0.0417in" fo:margin-bottom="0in" loext:contextual-spacing="false" fo:line-height="135%"/>
      <style:text-properties fo:color="#1d2129" fo:font-size="9pt" style:font-size-asian="9pt" style:font-size-complex="9pt"/>
    </style:style>
    <style:style style:name="P46" style:family="paragraph" style:parent-style-name="Standard">
      <style:paragraph-properties fo:margin-left="0.4165in" fo:margin-right="0.4165in" fo:text-indent="0in" style:auto-text-indent="false"/>
    </style:style>
    <style:style style:name="P47" style:family="paragraph" style:parent-style-name="Standard" style:master-page-name="Standard">
      <style:paragraph-properties style:page-number="1"/>
    </style:style>
    <style:style style:name="P48" style:family="paragraph" style:parent-style-name="Heading_20_2">
      <style:paragraph-properties fo:margin-top="0.25in" fo:margin-bottom="0.0555in" loext:contextual-spacing="false" fo:line-height="100%" fo:keep-together="auto" fo:keep-with-next="auto"/>
    </style:style>
    <style:style style:name="P49" style:family="paragraph" style:parent-style-name="Heading_20_3">
      <style:paragraph-properties fo:margin-top="0in" fo:margin-bottom="0.278in" loext:contextual-spacing="false" fo:line-height="139%" fo:keep-together="auto" fo:padding="0in" fo:border="none" fo:keep-with-next="auto"/>
    </style:style>
    <style:style style:name="P50" style:family="paragraph" style:parent-style-name="Heading_20_3">
      <style:paragraph-properties fo:margin-top="0.1945in" fo:margin-bottom="0.0555in" loext:contextual-spacing="false" fo:line-height="100%" fo:keep-together="auto" fo:keep-with-next="auto"/>
    </style:style>
    <style:style style:name="P51" style:family="paragraph">
      <loext:graphic-properties draw:fill="solid" draw:fill-color="#a0a0a0"/>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color="#1155cc" style:text-underline-style="solid" style:text-underline-width="auto" style:text-underline-color="font-color"/>
    </style:style>
    <style:style style:name="T5" style:family="text">
      <style:text-properties style:font-name="Roboto" fo:font-size="12pt" style:font-name-asian="Roboto1" style:font-size-asian="12pt" style:font-name-complex="Roboto1" style:font-size-complex="12pt"/>
    </style:style>
    <style:style style:name="T6" style:family="text">
      <style:text-properties style:text-position="super 58%" style:font-name="Roboto" fo:font-size="12pt" style:font-name-asian="Roboto1" style:font-size-asian="12pt" style:font-name-complex="Roboto1" style:font-size-complex="12pt"/>
    </style:style>
    <style:style style:name="T7" style:family="text">
      <style:text-properties fo:font-weight="bold" style:font-weight-asian="bold" style:font-weight-complex="bold"/>
    </style:style>
    <style:style style:name="T8" style:family="text">
      <style:text-properties fo:color="#333333" fo:font-size="10.5pt" fo:font-weight="bold" style:font-size-asian="10.5pt" style:font-weight-asian="bold" style:font-size-complex="10.5pt" style:font-weight-complex="bold"/>
    </style:style>
    <style:style style:name="T9" style:family="text">
      <style:text-properties fo:color="#333333" fo:font-size="10.5pt" style:font-size-asian="10.5pt" style:font-size-complex="10.5pt"/>
    </style:style>
    <style:style style:name="T10" style:family="text">
      <style:text-properties fo:color="#333333" style:font-name="Montserrat" fo:font-size="12.5pt" style:font-name-asian="Montserrat1" style:font-size-asian="12.5pt" style:font-name-complex="Montserrat1" style:font-size-complex="12.5pt"/>
    </style:style>
    <style:style style:name="T11" style:family="text">
      <style:text-properties fo:color="#1a75bb" fo:font-size="10.5pt" style:font-size-asian="10.5pt" style:font-size-complex="10.5pt"/>
    </style:style>
    <style:style style:name="T12" style:family="text">
      <style:text-properties fo:color="#ffffff" fo:font-size="10.5pt" fo:background-color="#ff6418" loext:char-shading-value="0" style:font-size-asian="10.5pt" style:font-size-complex="10.5pt"/>
    </style:style>
    <style:style style:name="T13" style:family="text">
      <style:text-properties fo:color="#1d2129" fo:font-size="9pt" style:font-size-asian="9pt" style:font-size-complex="9pt"/>
    </style:style>
    <style:style style:name="T14" style:family="text">
      <style:text-properties fo:color="#000000" fo:font-size="13pt" fo:font-weight="bold" style:font-size-asian="13pt" style:font-weight-asian="bold" style:font-size-complex="13pt" style:font-weight-complex="bold"/>
    </style:style>
    <style:style style:name="T15" style:family="text">
      <style:text-properties fo:font-size="17pt" fo:font-weight="bold" style:font-size-asian="17pt" style:font-weight-asian="bold" style:font-size-complex="17pt"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7/9 Thursday</text:span></text:p>
      <text:p text:style-name="P1"/>
      <text:p text:style-name="Standard"><text:span text:style-name="T1">Richard 2 jobs sent and confirmed </text:span></text:p>
      <text:p text:style-name="Standard"><text:span text:style-name="T1">1–</text:span><text:span text:style-name="T2">Joshua Soberano 1 pm unload 15ft truck North Bethesda, MD (404) 450-7688 | The apartment is on the 9th floor but the truck will be parked in the loading dock right beside the elevator for moving in. From the elevator it is about a 150-200ft walk to the apartment itself.</text:span></text:p>
      <text:p text:style-name="Standard"><text:span text:style-name="T2">Uhaul job pd 2hrs minimum $159/hr - CONF SENT 7/6</text:span></text:p>
      <text:p text:style-name="Standard"><text:span text:style-name="T1">3–</text:span><text:span text:style-name="T2">Chris Walton 3:30-4 pm load 15ft truck Springfield, VA (703) 618-8556 | </text:span></text:p>
      <text:p text:style-name="Standard"><text:span text:style-name="T2">Uhaul job pd 2hrs minimum $159/hr</text:span></text:p>
      <text:p text:style-name="P1"/>
      <text:p text:style-name="Standard"><text:span text:style-name="T1">Mystery Team </text:span></text:p>
      <text:p text:style-name="Standard"><text:span text:style-name="T2">2–Colette Godfrey 2 pm load 20ft truck Alexandria, VA(703) 568-4611 | No real long walks, possibly one light sofa table - that’s the only thing requiring stairs.<text:line-break/>Uhaul job pd 2hrs minimum $159/hr</text:span></text:p>
      <text:p text:style-name="P1"/>
      <text:p text:style-name="P1"/>
      <text:p text:style-name="Standard"><text:span text:style-name="T1">1</text:span></text:p>
      <text:p text:style-name="Standard"><text:span text:style-name="T2">Joshua Soberano 1 pm unload 15ft truck North Bethesda, MD (404) 450-7688 | The apartment is on the 9th floor but the truck will be parked in the loading dock right beside the elevator for moving in. From the elevator it is about a 150-200ft walk to the apartment itself.</text:span></text:p>
      <text:p text:style-name="Standard"><text:span text:style-name="T2">The truck is a 15’ truck. </text:span></text:p>
      <text:p text:style-name="Standard"><text:span text:style-name="T2">It will just be unloading at the apartment complex Wentworth House: 5411 McGrath Blvd, North Bethesda, MD 20852. </text:span></text:p>
      <text:p text:style-name="Standard"><text:span text:style-name="T2">The apartment is on the 9th floor but the truck will be parked in the loading dock right beside the elevator for moving in. </text:span></text:p>
      <text:p text:style-name="Standard"><text:span text:style-name="T2">From the elevator it is about a 150-200ft walk to the apartment itself.</text:span></text:p>
      <text:p text:style-name="Standard"><text:span text:style-name="T2">The inventory which we primarily need assistance with will includes 1 couch, 1 loveseat, 1 bedframe, 1 headboard, 1 boxspring, 1 queen size mattress, 1 twin mattress, 1 large table, 2 large rugs, and 2 side tables. We also have about 12 moving bags and smaller items, but the complex also provides a luggage cart that works well for those small items. </text:span></text:p>
      <text:p text:style-name="Standard"><text:span text:style-name="T2">It is for a 1 bedroom, and a living room. We should be okay with assembly just need manpower to bring all the items from truck to apartment. </text:span></text:p>
      <text:p text:style-name="Standard"><text:span text:style-name="T2">Other than the aforementioned items, no oversized or extremely heavy items. We also have a hand truck from U-Haul.</text:span></text:p>
      <text:p text:style-name="Standard"><text:span text:style-name="T2">Uhaul job pd 2hrs minimum $159/hr</text:span></text:p>
      <text:p text:style-name="Standard"><text:a xlink:type="simple" xlink:href="mailto:joshua.soberano@outlook.com" text:style-name="ListLabel_20_82" text:visited-style-name="ListLabel_20_82"><text:span text:style-name="T3">joshua.soberano@outlook.com</text:span></text:a><text:span text:style-name="T2"> </text:span></text:p>
      <text:p text:style-name="P2"/>
      <text:p text:style-name="Standard"><text:span text:style-name="T1">2</text:span></text:p>
      <text:p text:style-name="Standard"><text:span text:style-name="T2">Colette Godfrey 2 pm load 20ft truck Alexandria, VA(703) 568-4611 | No real long walks, possibly one light sofa table - that’s the only thing requiring stairs.</text:span></text:p>
      <text:p text:style-name="Standard"><text:span text:style-name="T2">Truck is 20ft </text:span></text:p>
      <text:p text:style-name="Standard"><text:span text:style-name="T2">9386 mount Vernon circle Alexandria, VA 22309</text:span></text:p>
      <text:p text:style-name="Standard"><text:span text:style-name="T2">Need help with loading</text:span></text:p>
      <text:p text:style-name="Standard"><text:span text:style-name="T2">5 larger garden planters. One chest with drawers, one chair, one rug</text:span></text:p>
      <text:p text:style-name="Standard"><text:span text:style-name="T2">One side table , a bunch of boxes etc, there’s a couch , a fragile large mirror. Etc</text:span></text:p>
      <text:p text:style-name="Standard"><text:span text:style-name="T2">China and glassware - fragile</text:span></text:p>
      <text:p text:style-name="Standard"><text:span text:style-name="T2">No real long walks, possibly one light sofa table - that’s the only thing requiring stairs.</text:span></text:p>
      <text:p text:style-name="Standard"><text:span text:style-name="T2">Uhaul job pd 2hrs minimum $159/hr</text:span></text:p>
      <text:p text:style-name="Standard"><text:span text:style-name="T2">coletteg1@aol.com</text:span></text:p>
      <text:p text:style-name="P2"/>
      <text:p text:style-name="Standard"><text:span text:style-name="T1">3</text:span></text:p>
      <text:p text:style-name="Standard"><text:span text:style-name="T2">Chris Walton 3:30-4 pm load 15ft truck Springfield, VA (703) 618-8556 | </text:span></text:p>
      <text:p text:style-name="Standard"><text:span text:style-name="T2">6223 Rathlin Dr <text:s/>Springfield, VA 22152</text:span></text:p>
      <text:p text:style-name="Standard"><text:span text:style-name="T2">We have a 15’ U-Haul truck. It will be partially loaded from an earlier load at a different address. </text:span></text:p>
      <text:p text:style-name="Standard"><text:span text:style-name="T2">It will be load only. King and twin mattress from second floor. Small cabinet and packed boxes. load with only a few large </text:span></text:p>
      <text:p text:style-name="Standard"><text:span text:style-name="T2">Uhaul job pd 2hrs minimum $159/hr</text:span></text:p>
      <text:p text:style-name="Standard"><text:a xlink:type="simple" xlink:href="mailto:walton.chris@gmail.com" text:style-name="ListLabel_20_82" text:visited-style-name="ListLabel_20_82"><text:span text:style-name="T3">walton.chris@gmail.com</text:span></text:a></text:p>
      <text:p text:style-name="P7"/>
      <text:p text:style-name="P3"/>
      <text:p text:style-name="P3"/>
      <text:p text:style-name="P3"/>
      <text:p text:style-name="P3"/>
      <text:p text:style-name="P3"/>
      <text:p text:style-name="P3"/>
      <text:p text:style-name="Standard"><text:span text:style-name="T5">Customer </text:span></text:p>
      <text:p text:style-name="P3"/>
      <text:p text:style-name="Standard"><text:span text:style-name="T5">Dear DC Top Choice Movers,</text:span></text:p>
      <text:p text:style-name="P3"><text:soft-page-break/></text:p>
      <text:p text:style-name="Standard"><text:span text:style-name="T5">My name is Joshua Soberano and I booked a 2-person team on the afternoon of July 9 through U-Haul's Moving Help platform. I was just reaching out to confirm an exact time that we could get the movers to help and get further information before the holiday. Thank you. </text:span></text:p>
      <text:p text:style-name="P3"/>
      <text:p text:style-name="Standard"><text:span text:style-name="T5">Best,</text:span></text:p>
      <text:p text:style-name="Standard"><text:span text:style-name="T5">Joshua </text:span></text:p>
      <text:p text:style-name="P3"/>
      <text:p text:style-name="Standard"><text:span text:style-name="T5">us</text:span></text:p>
      <text:p text:style-name="Standard"><text:span text:style-name="T5">Hi Joshua, we are setting up your move, please let us know:</text:span></text:p>
      <text:list xml:id="list2557235878" text:style-name="WWNum1">
        <text:list-item>
          <text:p text:style-name="P8"><text:span text:style-name="T5">size of your moving truck</text:span></text:p>
        </text:list-item>
        <text:list-item>
          <text:p text:style-name="P17"><text:span text:style-name="T5">addresses and will we help you load, unload or both</text:span></text:p>
        </text:list-item>
        <text:list-item>
          <text:p text:style-name="P17"><text:span text:style-name="T5">inventory or at least a bedroom count and basic estimate so we can be prepared</text:span></text:p>
        </text:list-item>
        <text:list-item>
          <text:p text:style-name="P17"><text:span text:style-name="T5">any oversize or super delicate items, anything over 225 lbs</text:span></text:p>
        </text:list-item>
        <text:list-item>
          <text:p text:style-name="P17"><text:span text:style-name="T5">will you want help with breakdown or assembly</text:span></text:p>
        </text:list-item>
        <text:list-item>
          <text:p text:style-name="P17"><text:span text:style-name="T5">any info about stairs, elevators, or long walks</text:span></text:p>
        </text:list-item>
        <text:list-item>
          <text:p text:style-name="P26"><text:span text:style-name="T5">possible times we can help you, so we can get you on schedule :) </text:span></text:p>
        </text:list-item>
      </text:list>
      <text:p text:style-name="Standard"><text:span text:style-name="T5">Thank you. Aubrey (for Robin) </text:span></text:p>
      <text:p text:style-name="P3"/>
      <text:p text:style-name="P3"/>
      <text:p text:style-name="Standard">Customer </text:p>
      <text:p text:style-name="Standard"><text:span text:style-name="T5">The truck is a 15’ truck. It will just be unloading at the apartment complex Wentworth House: 5411 McGrath Blvd, North Bethesda, MD 20852. The apartment is on the 9</text:span><text:span text:style-name="T6">th</text:span><text:span text:style-name="T5"> floor but the truck will be parked in the loading dock right beside the elevator for moving in. From the elevator it is about a 150-200ft walk to the apartment itself. The inventory which we primarily need assistance with will includes 1 couch, 1 loveseat, 1 bedframe, 1 headboard, 1 boxspring, 1 queen size mattress, 1 twin mattress, 1 large table, 2 large rugs, and 2 side tables. We also have about 12 moving bags and smaller items, but the complex also provides a luggage cart that works well for those small items. It is for a 1 bedroom, and a living room. We should be okay with assembly just need manpower to bring all the items from truck to apartment. Other than the aforementioned items, no oversized or extremely heavy items. We also have a hand truck from the U-Haul. </text:span></text:p>
      <text:p text:style-name="P3"/>
      <text:p text:style-name="Standard"><text:span text:style-name="T5">For the time, our preferred window is 1-3pm, but that would be the latest possible start time, and we could arrive as early as 12pm. Thank you. </text:span></text:p>
      <text:p text:style-name="P3"/>
      <text:p text:style-name="Standard"><text:span text:style-name="T5">Best,</text:span></text:p>
      <text:p text:style-name="Standard"><text:span text:style-name="T5">Joshua </text:span></text:p>
      <text:p text:style-name="Standard"/>
      <text:p text:style-name="Standard">Us</text:p>
      <text:p text:style-name="Standard">We can do 1 pm.</text:p>
      <text:p text:style-name="Standard"/>
      <text:p text:style-name="Standard">Us</text:p>
      <text:p text:style-name="Standard">Confirming your job tomorrow at 1 pm.</text:p>
      <text:p text:style-name="Standard"/>
      <text:p text:style-name="Standard">Below is our advice on pads again, as they are so important to have even if we are just unloading you make sure you have them for your load.</text:p>
      <text:p text:style-name="Standard"/>
      <text:p text:style-name="Standard">Payment:</text:p>
      <text:p text:style-name="Standard">You paid Moving Helper for the time you selected and in return they gave you a “payment code” (6 digits all numbers) for you to give to us. We enter this code on our side to show we have completed your job and get our percentage released to us. If you have it ready to give the guys when they are done helping you we would really appreciate it. It is very easy to retrieve code by calling 1-866-748-4110 and pressing 2 and 1 to hear a recording of the code. Thank you.·</text:p>
      <text:p text:style-name="Standard"/>
      <text:p text:style-name="Standard"><text:s/></text:p>
      <text:p text:style-name="Standard">Pads:</text:p>
      <text:p text:style-name="Standard">Furniture pads, which you can rent when you rent truck then, are very important to protect everything. I recommend counting all your pieces of furniture down to the smallest end table, then add pictures, mirrors and multiply that by 1.25 as some things like the couch and dresser take 2 pads. We can improvise with your blankets, sheets, etc to protect furniture, but everything must be covered to prevent friction damage (scratches) during drive. Always better to have extra pads scratched furnitur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1">Hi there,</text:p>
      <text:p text:style-name="P31">I help Robin through email and wanted to send you an introductory message since he cannot call you right now. If you could please answer the questions below, I can get your move all set up.</text:p>
      <text:p text:style-name="P31">Thanks -- Aubrey</text:p>
      <text:p text:style-name="Standard"><draw:rect text:anchor-type="as-char" style:rel-width="100%" draw:z-index="0" draw:style-name="gr1" draw:text-style-name="P51" svg:width="0.0012in" svg:height="0.0213in"><text:p/></draw:rect></text:p>
      <text:p text:style-name="P31"><text:span text:style-name="T7">Automated Message:</text:span></text:p>
      <text:p text:style-name="P31">Robin from DC Top Choice Movers here. I am currently on a job but wanted to touch base with you about your upcoming move. Is email a good way to gather information about your move so we can help you? We really appreciate it if you can email us some details. If we need to talk, I will make time when I am not working with another customer. Thank you.</text:p>
      <text:p text:style-name="P31">Any information you can provide by email is greatly appreciated. While I may not have time to return voicemails until after jobs are complete, I try to respond to emails during lunch breaks or whenever I have a chance, whether late at night or early in the morning. Additionally, I have an assistant and a family member who help with emails, so you often get a fast response.</text:p>
      <text:p text:style-name="P31">I do try to return voicemails within 24 hours, but I greatly appreciate email communication.</text:p>
      <text:p text:style-name="P31">-- Robin</text:p>
      <text:p text:style-name="P31"><text:a xlink:type="simple" xlink:href="http://www.dctopchoicemovers.com" text:style-name="ListLabel_20_83" text:visited-style-name="ListLabel_20_83"><text:span text:style-name="T4">www.DCTopChoiceMovers.com</text:span></text:a></text:p>
      <text:p text:style-name="P31">703-679-7761</text:p>
      <text:p text:style-name="Standard"><draw:rect text:anchor-type="as-char" style:rel-width="100%" draw:z-index="1" draw:style-name="gr1" draw:text-style-name="P51" svg:width="0.0012in" svg:height="0.0213in"><text:p/></draw:rect></text:p>
      <text:p text:style-name="P31"><text:span text:style-name="T7">The info that we already have:</text:span></text:p>
      <text:p text:style-name="P32"><text:span text:style-name="T8">Customer Notes</text:span></text:p>
      <text:p text:style-name="P34"><text:span text:style-name="T9">Studio to 1 Bedroom Apt. - 0 flights of stairs.<text:line-break/>20ft truck</text:span></text:p>
      <text:p text:style-name="P49"><text:bookmark text:name="_ntuqj3kkryo"/><text:span text:style-name="T10">Item Descriptions / Photos</text:span></text:p>
      <text:p text:style-name="P33"><text:a xlink:type="simple" xlink:href="https://www.movinghelper.com/Jobs/JobItems/1885a1b9-5e73-43be-995b-884e901e7fc2" text:style-name="ListLabel_20_84" text:visited-style-name="ListLabel_20_84"><text:span text:style-name="T11">Add/View </text:span></text:a></text:p>
      <text:p text:style-name="P32"><text:span text:style-name="T9">Service Provider - Saved Items: 0 /20</text:span></text:p>
      <text:p text:style-name="P32"><text:span text:style-name="T9">Customer - Saved Items: 0 /10</text:span></text:p>
      <text:p text:style-name="P49"><text:bookmark text:name="_mmai0rakz1al"/><text:span text:style-name="T10">Payment Code</text:span></text:p>
      <text:p text:style-name="P35"><text:span text:style-name="T9"><text:s/>This job is scheduled for a future date. Entering payment code prior to job completion is a violation of the Moving Helper agreement and could result in deactivation. If the job has been completed, would you like to proceed with inputting this payment code?<text:line-break/></text:span><text:span text:style-name="T12">Yes</text:span><text:span text:style-name="T9"> </text:span><text:span text:style-name="T11">No</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4"><text:span text:style-name="T8">Load/Unload - JB-1885a1b9</text:span></text:p>
          </table:table-cell>
          <table:covered-table-cell/>
          <table:covered-table-cell/>
          <table:covered-table-cell/>
          <table:covered-table-cell/>
        </table:table-row>
        <table:table-row table:style-name="Table1.2">
          <table:table-cell table:style-name="Table1.A1" office:value-type="string">
            <text:p text:style-name="P4"><text:span text:style-name="T9">07/09/2026</text:span></text:p>
            <text:p text:style-name="P4"><text:span text:style-name="T9">Afternoon</text:span></text:p>
            <text:p text:style-name="P4"><text:a xlink:type="simple" xlink:href="https://www.movinghelper.com/Jobs/Week?WeekStart=2026-07-05" text:style-name="ListLabel_20_84" text:visited-style-name="ListLabel_20_84"><text:span text:style-name="T11">view on calendar</text:span></text:a></text:p>
            <text:p text:style-name="P36"><text:a xlink:type="simple" xlink:href="https://www.movinghelper.com/Jobs/Details/1885a1b9-5e73-43be-995b-884e901e7fc2#" text:style-name="ListLabel_20_84" text:visited-style-name="ListLabel_20_84"><text:span text:style-name="T11">Reschedule</text:span></text:a></text:p>
          </table:table-cell>
          <table:table-cell table:style-name="Table1.A1" office:value-type="string">
            <text:p text:style-name="P4"><text:span text:style-name="T9">Colette Godfrey</text:span></text:p>
            <text:p text:style-name="P4"><text:span text:style-name="T9">9386 Mount Vernon Circle</text:span></text:p>
            <text:p text:style-name="P4"><text:span text:style-name="T9">Alexandria, VA 22309</text:span></text:p>
            <text:p text:style-name="P4"><text:a xlink:type="simple" xlink:href="https://www.movinghelper.com/Maps/Job/1885a1b9-5e73-43be-995b-884e901e7fc2" text:style-name="ListLabel_20_84" text:visited-style-name="ListLabel_20_84"><text:span text:style-name="T11">view on map / change address</text:span></text:a></text:p>
          </table:table-cell>
          <table:table-cell table:style-name="Table1.A1" office:value-type="string">
            <text:p text:style-name="P4"><text:span text:style-name="T9">2 person crew</text:span></text:p>
            <text:p text:style-name="P4"><text:span text:style-name="T9">2 hours</text:span></text:p>
          </table:table-cell>
          <table:table-cell table:style-name="Table1.A1" office:value-type="string">
            <text:p text:style-name="P5"/>
          </table:table-cell>
          <table:table-cell table:style-name="Table1.A1" office:value-type="string">
            <text:p text:style-name="P4"><text:span text:style-name="T9">Total: $318.00</text:span></text:p>
          </table:table-cell>
        </table:table-row>
        <table:table-row table:style-name="Table1.1">
          <table:table-cell table:style-name="Table1.A1" table:number-columns-spanned="4" office:value-type="string">
            <text:p text:style-name="P4"><text:span text:style-name="T8">Order total:</text:span></text:p>
          </table:table-cell>
          <table:covered-table-cell/>
          <table:covered-table-cell/>
          <table:covered-table-cell/>
          <table:table-cell table:style-name="Table1.A1" office:value-type="string">
            <text:p text:style-name="P4"><text:span text:style-name="T8">USD $318.00</text:span></text:p>
          </table:table-cell>
        </table:table-row>
      </table:table>
      <text:p text:style-name="Standard"><draw:rect text:anchor-type="as-char" style:rel-width="100%" draw:z-index="2" draw:style-name="gr1" draw:text-style-name="P51" svg:width="0.0012in" svg:height="0.0213in"><text:p/></draw:rect></text:p>
      <text:p text:style-name="P31"><text:span text:style-name="T7">The info that will help your move go smoothly and efficiently:</text:span></text:p>
      <text:list xml:id="list3333324826" text:style-name="WWNum4">
        <text:list-item>
          <text:p text:style-name="P9"><text:span text:style-name="T7">Preferred Timeframes:</text:span></text:p>
          <text:list>
            <text:list-item>
              <text:p text:style-name="P37">On weekdays, we offer start times of 8 AM, 9 AM or 10 AM or afternoon start times of 1 PM, 2 PM, or 3 PM.</text:p>
            </text:list-item>
            <text:list-item>
              <text:p text:style-name="P37">We don't subcontract and only use our own set of movers, so on weekends and short notice, we may have limited availability. If possible, please give us more than one preferred time or a window that will work for you, and we will do our best to accommodate.</text:p>
            </text:list-item>
            <text:list-item>
              <text:p text:style-name="P37">Please provide a 30-minute arrival window to account for DC area traffic. If you are on a tight schedule, let us know so we can plan to arrive early.</text:p>
            </text:list-item>
          </text:list>
        </text:list-item>
        <text:list-item>
          <text:p text:style-name="P18"><text:span text:style-name="T7">The Basics:</text:span></text:p>
          <text:list>
            <text:list-item>
              <text:p text:style-name="P37">A quick list of furniture and items, as well as an estimate of the number and size of totes or boxes, is very helpful. This helps us ensure you have the right size truck and avoid additional costs.</text:p>
            </text:list-item>
            <text:list-item>
              <text:p text:style-name="P37">Are we loading, unloading, or both?</text:p>
            </text:list-item>
            <text:list-item>
              <text:p text:style-name="P37">The address(es) we will be helping at.</text:p>
            </text:list-item>
            <text:list-item>
              <text:p text:style-name="P37">Will there be any extremely large or delicate furniture or other items that require more than a furniture pad?</text:p>
            </text:list-item>
            <text:list-item>
              <text:p text:style-name="P37">What is your heaviest item? </text:p>
            </text:list-item>
            <text:list-item>
              <text:p text:style-name="P37">Is there anything over 125/150 lbs that will need to go up or down stairs?</text:p>
            </text:list-item>
            <text:list-item>
              <text:p text:style-name="P37">Will you need help with any assembly or disassembly?</text:p>
            </text:list-item>
            <text:list-item>
              <text:p text:style-name="P37">What size is your truck, and if we are loading, how many pads did you rent?</text:p>
            </text:list-item>
            <text:list-item>
              <text:p text:style-name="P41">Does the terrain present special challenges (stairs, elevators, long hallways, hills, narrow or uneven walks)?</text:p>
            </text:list-item>
          </text:list>
        </text:list-item>
      </text:list>
      <text:p text:style-name="P31">Providing this information allows us to plan for any unexpected obstacles and ensure a smooth move. If you are unsure how long your job will take, we can estimate the time needed with the above details. If you are unable to provide this information, please allow us to schedule you as the second job in the afternoon so you can have your team for as long as necessary.</text:p>
      <text:p text:style-name="Standard"><draw:rect text:anchor-type="as-char" style:rel-width="100%" draw:z-index="3" draw:style-name="gr1" draw:text-style-name="P51" svg:width="0.0012in" svg:height="0.0213in"><text:p/></draw:rect></text:p>
      <text:p text:style-name="P31"><text:span text:style-name="T7">Additional useful info:</text:span></text:p>
      <text:list xml:id="list290553074" text:style-name="WWNum5">
        <text:list-item>
          <text:p text:style-name="P10"><text:span text:style-name="T7">Pads:</text:span></text:p>
          <text:list>
            <text:list-item>
              <text:p text:style-name="P38">Furniture pads, which you can rent when you rent a truck, are crucial for protecting your items. I recommend counting all your pieces of furniture, including small items, pictures, and mirrors, and multiplying that number by 1.25. This accounts for items like couches and dressers that require two pads. We can improvise with your blankets, sheets, etc., but everything must be covered to prevent friction damage during the drive.</text:p>
            </text:list-item>
          </text:list>
        </text:list-item>
        <text:list-item>
          <text:p text:style-name="P19"><text:span text:style-name="T7">Payment:</text:span></text:p>
          <text:list>
            <text:list-item>
              <text:p text:style-name="P38">You paid Moving Helper for the time you selected, and they provided you with a “payment code” (6 digits, all numbers). Please have this code ready for us when the job is complete, so we can enter it and receive our payment. If you need to retrieve the code, call 1-866-748-4110 and follow the prompts. Having this code ready is greatly appreciated.</text:p>
            </text:list-item>
          </text:list>
        </text:list-item>
        <text:list-item>
          <text:p text:style-name="P19"><text:span text:style-name="T7">Additional Time:</text:span></text:p>
          <text:list>
            <text:list-item>
              <text:p text:style-name="P38">If you need more time, you can call Moving Helper to add more hours. They round up to the nearest hour. Alternatively, we can accept payment directly if you prefer, and we can prorate the time, so you only pay for the time you use. If you think you will need more time than you booked, please let us know so we can block off enough time.</text:p>
            </text:list-item>
          </text:list>
        </text:list-item>
        <text:list-item>
          <text:p text:style-name="P19"><text:span text:style-name="T7">Truck Size:</text:span></text:p>
          <text:list>
            <text:list-item>
              <text:p text:style-name="P42">Renting a truck one size larger than recommended ensures everything fits and reduces stress. It also allows us to pack the truck more efficiently, saving time and money.</text:p>
            </text:list-item>
          </text:list>
        </text:list-item>
      </text:list>
      <text:p text:style-name="Standard"><draw:rect text:anchor-type="as-char" style:rel-width="100%" draw:z-index="4" draw:style-name="gr1" draw:text-style-name="P51" svg:width="0.0012in" svg:height="0.0213in"><text:p/></draw:rect></text:p>
      <text:p text:style-name="P31"><text:soft-page-break/><text:span text:style-name="T7">Equipment Checklist:</text:span></text:p>
      <text:list xml:id="list1982236310" text:style-name="WWNum6">
        <text:list-item>
          <text:p text:style-name="P11"><text:span text:style-name="T7">Furniture pads</text:span> are the #1 tool we need for a safe load. Use 1.25 pads per item of furniture.</text:p>
        </text:list-item>
        <text:list-item>
          <text:p text:style-name="P20"><text:span text:style-name="T7">Rope, bungees, or ratchet straps</text:span> are essential for securing items. Ratchet straps are preferred for their ability to hold a load securely.</text:p>
        </text:list-item>
        <text:list-item>
          <text:p text:style-name="P20"><text:span text:style-name="T7">Dollies</text:span> are useful for ground floor and elevator moves but not for stair moves. Heavy items should be in small boxes to ensure safety and ease of carrying.</text:p>
        </text:list-item>
        <text:list-item>
          <text:p text:style-name="P27"><text:span text:style-name="T7">Shrink wrap or tape</text:span> helps keep drawers from opening and secures blankets. If unavailable, we can remove drawers and carefully carry furniture to the truck, where we will drape furniture pads over everything.</text:p>
        </text:list-item>
      </text:list>
      <text:p text:style-name="P31">We are professional movers and have a few tricks up our sleeves to go above and beyond for our customers. However, due to our contract as "labor only" with U-Haul, we are prohibited from providing any equipment. We know how to use it, though! If you prefer to buy rather than rent any equipment, we can provide links to the least expensive options online.</text:p>
      <text:p text:style-name="P31">Thanks, and good luck with all the preparations and packing.</text:p>
      <text:p text:style-name="Standard"><draw:rect text:anchor-type="as-char" style:rel-width="100%" draw:z-index="5" draw:style-name="gr1" draw:text-style-name="P51" svg:width="0.0012in" svg:height="0.0213in"><text:p/></draw:rect></text:p>
      <text:p text:style-name="P31">-- Robin</text:p>
      <text:p text:style-name="P31"><text:a xlink:type="simple" xlink:href="http://www.dctopchoicemovers.com" text:style-name="ListLabel_20_83" text:visited-style-name="ListLabel_20_83"><text:span text:style-name="T4">www.DCTopChoiceMovers.com</text:span></text:a></text:p>
      <text:p text:style-name="P31">703-679-7761</text:p>
      <text:p text:style-name="P45"/>
      <text:p text:style-name="Standard"/>
      <text:p text:style-name="P45"/>
      <text:p text:style-name="Standard"><draw:frame draw:style-name="fr1" draw:name="image28.png" text:anchor-type="as-char" svg:width="0.8335in" svg:height="0.8335in" draw:z-index="0"><draw:image xlink:href="Pictures/100000000000005000000050276884CD8BB0CFB9.png" xlink:type="simple" xlink:show="embed" xlink:actuate="onLoad" loext:mime-type="image/png"/></draw:frame></text:p>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6"/>
            <table:table table:name="Table2" table:style-name="Table2">
              <table:table-column table:style-name="Table2.A"/>
              <table:table-row table:style-name="Table2.1">
                <table:table-cell table:style-name="Table2.A1" office:value-type="string">
                  <text:p text:style-name="P50"><text:bookmark text:name="_mbjeni752cq3"/><text:span text:style-name="T14">Colette GODFREY</text:span></text:p>
                </table:table-cell>
              </table:table-row>
            </table:table>
            <text:p text:style-name="Standard"/>
          </table:table-cell>
          <table:table-cell table:style-name="Table4.A1" office:value-type="string">
            <text:p text:style-name="Standard">Tue, Jul 7, 9:15 AM (3 days ago)</text:p>
          </table:table-cell>
          <table:table-cell table:style-name="Table4.A1" office:value-type="string">
            <text:p text:style-name="Standard"/>
          </table:table-cell>
          <table:table-cell table:style-name="Table4.A1" table:number-rows-spanned="2" office:value-type="string">
            <text:p text:style-name="Standard"/>
          </table:table-cell>
        </table:table-row>
        <table:table-row table:style-name="Table4.2">
          <table:table-cell table:style-name="Table4.A1" table:number-columns-spanned="3" office:value-type="string">
            <text:p text:style-name="Standard"/>
            <table:table table:name="Table3" table:style-name="Table3">
              <table:table-column table:style-name="Table3.A"/>
              <table:table-row table:style-name="Table3.1">
                <table:table-cell table:style-name="Table3.A1" office:value-type="string">
                  <text:p text:style-name="Standard">to me</text:p>
                  <text:p text:style-name="Standard"><draw:frame draw:style-name="fr1" draw:name="image11.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Please call me if you need info. <text:s/>The move is Thursday. </text:p>
      <text:p text:style-name="Standard">Sent from my iPhone</text:p>
      <text:p text:style-name="Standard"/>
      <text:p text:style-name="P46">On Jul 4, 2026, at 4:56 PM, DC Top Choice Movers &lt;dctopchoicemovers@gmail.com&gt; wrote:</text:p>
      <text:p text:style-name="Standard"><draw:frame draw:style-name="fr1" draw:name="image17.jpg" text:anchor-type="as-char" svg:width="0.8335in" svg:height="0.8335in" draw:z-index="0"><draw:image xlink:href="Pictures/100000000000005000000050619D9736512D237D.jpg" xlink:type="simple" xlink:show="embed" xlink:actuate="onLoad" loext:mime-type="image/jpeg"/></draw:frame></text:p>
      <table:table table:name="Table7" table:style-name="Table7">
        <table:table-column table:style-name="Table7.A"/>
        <table:table-column table:style-name="Table7.B"/>
        <table:table-column table:style-name="Table7.C" table:number-columns-repeated="2"/>
        <table:table-row table:style-name="Table7.1">
          <table:table-cell table:style-name="Table7.A1" office:value-type="string">
            <text:p text:style-name="Standard"/>
            <table:table table:name="Table5" table:style-name="Table5">
              <table:table-column table:style-name="Table5.A"/>
              <table:table-row table:style-name="Table5.1">
                <table:table-cell table:style-name="Table5.A1" office:value-type="string">
                  <text:p text:style-name="P50"><text:bookmark text:name="_fufu1f526p07"/><text:span text:style-name="T14">DC Top Choice Movers &lt;dctopchoicemovers@gmail.com&gt;</text:span></text:p>
                </table:table-cell>
              </table:table-row>
            </table:table>
            <text:p text:style-name="Standard"/>
          </table:table-cell>
          <table:table-cell table:style-name="Table7.A1" office:value-type="string">
            <text:p text:style-name="Standard">Tue, Jul 7, 10:03 AM (3 days ago)</text:p>
          </table:table-cell>
          <table:table-cell table:style-name="Table7.A1" office:value-type="string">
            <text:p text:style-name="Standard"/>
          </table:table-cell>
          <table:table-cell table:style-name="Table7.A1" table:number-rows-spanned="2" office:value-type="string">
            <text:p text:style-name="Standard"/>
          </table:table-cell>
        </table:table-row>
        <table:table-row table:style-name="Table7.2">
          <table:table-cell table:style-name="Table7.A1" table:number-columns-spanned="3" office:value-type="string">
            <text:p text:style-name="Standard"/>
            <table:table table:name="Table6" table:style-name="Table6">
              <table:table-column table:style-name="Table6.A"/>
              <table:table-row table:style-name="Table6.1">
                <table:table-cell table:style-name="Table6.A1" office:value-type="string">
                  <text:p text:style-name="Standard">to Colette</text:p>
                  <text:p text:style-name="Standard"><draw:frame draw:style-name="fr1" draw:name="image10.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Hi Collette, </text:p>
      <text:p text:style-name="Standard"/>
      <text:p text:style-name="Standard">I only assist on emails but if you can provide the info below, I can ask the owner once he's done helping customers move to call you if you still need to speak to someone over the phone? </text:p>
      <text:list xml:id="list150990012" text:style-name="WWNum8">
        <text:list-item>
          <text:p text:style-name="P12">size of your moving truck</text:p>
        </text:list-item>
        <text:list-item>
          <text:p text:style-name="P21">addresses and will we help you load, unload or both</text:p>
        </text:list-item>
        <text:list-item>
          <text:p text:style-name="P21">inventory or at least a bedroom count and basic estimate so we can be prepared</text:p>
        </text:list-item>
        <text:list-item>
          <text:p text:style-name="P21">any oversize or super delicate items, anything over 225 lbs</text:p>
        </text:list-item>
        <text:list-item>
          <text:p text:style-name="P21">will you want help with breakdown or assembly</text:p>
        </text:list-item>
        <text:list-item>
          <text:p text:style-name="P21">any info about stairs, elevators, or long walks</text:p>
        </text:list-item>
        <text:list-item>
          <text:p text:style-name="P28">possible times we can help you, so we can get you on schedule :) </text:p>
        </text:list-item>
      </text:list>
      <text:p text:style-name="Standard">Thank you. Aubrey (for Robin) </text:p>
      <text:p text:style-name="Standard"><draw:frame draw:style-name="fr1" draw:name="image27.png" text:anchor-type="as-char" svg:width="0.8335in" svg:height="0.8335in" draw:z-index="0"><draw:image xlink:href="Pictures/100000000000005000000050276884CD8BB0CFB9.png" xlink:type="simple" xlink:show="embed" xlink:actuate="onLoad" loext:mime-type="image/png"/></draw:frame></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Standard"/>
            <table:table table:name="Table8" table:style-name="Table8">
              <table:table-column table:style-name="Table8.A"/>
              <table:table-row table:style-name="Table8.1">
                <table:table-cell table:style-name="Table8.A1" office:value-type="string">
                  <text:p text:style-name="P50"><text:bookmark text:name="_fj4v1x5euh3a"/><text:span text:style-name="T14">Colette GODFREY</text:span></text:p>
                </table:table-cell>
              </table:table-row>
            </table:table>
            <text:p text:style-name="Standard"/>
          </table:table-cell>
          <table:table-cell table:style-name="Table10.A1" office:value-type="string">
            <text:p text:style-name="Standard">Tue, Jul 7, 8:49 PM (3 days ago)</text:p>
          </table:table-cell>
          <table:table-cell table:style-name="Table10.A1" office:value-type="string">
            <text:p text:style-name="Standard"/>
          </table:table-cell>
          <table:table-cell table:style-name="Table10.A1" table:number-rows-spanned="2" office:value-type="string">
            <text:p text:style-name="Standard"/>
          </table:table-cell>
        </table:table-row>
        <table:table-row table:style-name="Table10.2">
          <table:table-cell table:style-name="Table10.A1" table:number-columns-spanned="3" office:value-type="string">
            <text:p text:style-name="Standard"/>
            <table:table table:name="Table9" table:style-name="Table9">
              <table:table-column table:style-name="Table9.A"/>
              <table:table-row table:style-name="Table9.1">
                <table:table-cell table:style-name="Table9.A1" office:value-type="string">
                  <text:p text:style-name="Standard">to me</text:p>
                  <text:p text:style-name="Standard"><draw:frame draw:style-name="fr1" draw:name="image8.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1). truck is 20ft </text:p>
      <text:p text:style-name="Standard">2) 9386 mount Vernon circle Alexandria,Va 22309</text:p>
      <text:p text:style-name="Standard">Need help with loading</text:p>
      <text:p text:style-name="Standard">3) 5 larger garden planters. One chest with drawers, one chair, one rug</text:p>
      <text:p text:style-name="Standard">One side table , a bunch of boxes etc </text:p>
      <text:p text:style-name="Standard">4)China and glassware - fragile</text:p>
      <text:p text:style-name="Standard">5)no </text:p>
      <text:p text:style-name="Standard">6) no real long walks, possibly one light sofa table - that’s the only thing requiring stairs. </text:p>
      <text:p text:style-name="Standard">7) 2-4pm </text:p>
      <text:p text:style-name="Standard"/>
      <text:p text:style-name="Standard">What’s the charge if we need an extra half hour or hour? </text:p>
      <text:p text:style-name="Standard"/>
      <text:p text:style-name="Standard">Sent from my iPhone</text:p>
      <text:p text:style-name="Standard"/>
      <text:p text:style-name="P46">On Jul 7, 2026, at 10:03 AM, DC Top Choice Movers &lt;dctopchoicemovers@gmail.com&gt; wrote:</text:p>
      <text:p text:style-name="Standard"><draw:frame draw:style-name="fr1" draw:name="image29.png" text:anchor-type="as-char" svg:width="0.8335in" svg:height="0.8335in" draw:z-index="0"><draw:image xlink:href="Pictures/100000000000005000000050276884CD8BB0CFB9.png" xlink:type="simple" xlink:show="embed" xlink:actuate="onLoad" loext:mime-type="image/png"/></draw:frame></text:p>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Standard"/>
            <table:table table:name="Table11" table:style-name="Table11">
              <table:table-column table:style-name="Table11.A"/>
              <table:table-row table:style-name="Table11.1">
                <table:table-cell table:style-name="Table11.A1" office:value-type="string">
                  <text:p text:style-name="P50"><text:bookmark text:name="_9qi9yuq8acwh"/><text:span text:style-name="T14">Colette GODFREY</text:span></text:p>
                </table:table-cell>
              </table:table-row>
            </table:table>
            <text:p text:style-name="Standard"/>
          </table:table-cell>
          <table:table-cell table:style-name="Table13.A1" office:value-type="string">
            <text:p text:style-name="Standard">Tue, Jul 7, 9:13 PM (3 days ago)</text:p>
          </table:table-cell>
          <table:table-cell table:style-name="Table13.A1" office:value-type="string">
            <text:p text:style-name="Standard"/>
          </table:table-cell>
          <table:table-cell table:style-name="Table13.A1" table:number-rows-spanned="2" office:value-type="string">
            <text:p text:style-name="Standard"/>
          </table:table-cell>
        </table:table-row>
        <table:table-row table:style-name="Table13.2">
          <table:table-cell table:style-name="Table13.A1" table:number-columns-spanned="3" office:value-type="string">
            <text:p text:style-name="Standard"/>
            <table:table table:name="Table12" table:style-name="Table12">
              <table:table-column table:style-name="Table12.A"/>
              <table:table-row table:style-name="Table12.1">
                <table:table-cell table:style-name="Table12.A1" office:value-type="string">
                  <text:p text:style-name="Standard">to me</text:p>
                  <text:p text:style-name="Standard"><draw:frame draw:style-name="fr1" draw:name="image2.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More to my last email. </text:p>
      <text:p text:style-name="Standard">That wasn’t a complete list of stuff - there’s a couch , a fragile large mirror. Etc </text:p>
      <text:p text:style-name="Standard">You don’t need a whole list I don’t think. It’s 2 hours. </text:p>
      <text:p text:style-name="Standard">Sent from my iPhone</text:p>
      <text:p text:style-name="Standard"/>
      <text:p text:style-name="P46">On Jul 7, 2026, at 8:48 PM, Colette GODFREY &lt;coletteg1@aol.com&gt; wrote:</text:p>
      <text:p text:style-name="P46"/>
      <text:p text:style-name="P46">﻿1). truck is 20ft </text:p>
      <text:p text:style-name="Standard"><draw:frame draw:style-name="fr1" draw:name="image21.jpg" text:anchor-type="as-char" svg:width="0.8335in" svg:height="0.8335in" draw:z-index="0"><draw:image xlink:href="Pictures/100000000000005000000050619D9736512D237D.jpg" xlink:type="simple" xlink:show="embed" xlink:actuate="onLoad" loext:mime-type="image/jpeg"/></draw:frame></text:p>
      <table:table table:name="Table16" table:style-name="Table16">
        <table:table-column table:style-name="Table16.A"/>
        <table:table-column table:style-name="Table16.B"/>
        <table:table-column table:style-name="Table16.C" table:number-columns-repeated="2"/>
        <table:table-row table:style-name="Table16.1">
          <table:table-cell table:style-name="Table16.A1" office:value-type="string">
            <text:p text:style-name="Standard"/>
            <table:table table:name="Table14" table:style-name="Table14">
              <table:table-column table:style-name="Table14.A"/>
              <table:table-row table:style-name="Table14.1">
                <table:table-cell table:style-name="Table14.A1" office:value-type="string">
                  <text:p text:style-name="P50"><text:bookmark text:name="_6cyaqip4kvcw"/><text:span text:style-name="T14">DC Top Choice Movers &lt;dctopchoicemovers@gmail.com&gt;</text:span></text:p>
                </table:table-cell>
              </table:table-row>
            </table:table>
            <text:p text:style-name="Standard"/>
          </table:table-cell>
          <table:table-cell table:style-name="Table16.A1" office:value-type="string">
            <text:p text:style-name="Standard">Wed, Jul 8, 11:15 AM (2 days ago)</text:p>
          </table:table-cell>
          <table:table-cell table:style-name="Table16.A1" office:value-type="string">
            <text:p text:style-name="Standard"/>
          </table:table-cell>
          <table:table-cell table:style-name="Table16.A1" table:number-rows-spanned="2" office:value-type="string">
            <text:p text:style-name="Standard"/>
          </table:table-cell>
        </table:table-row>
        <table:table-row table:style-name="Table16.2">
          <table:table-cell table:style-name="Table16.A1" table:number-columns-spanned="3" office:value-type="string">
            <text:p text:style-name="Standard"/>
            <table:table table:name="Table15" table:style-name="Table15">
              <table:table-column table:style-name="Table15.A"/>
              <table:table-row table:style-name="Table15.1">
                <table:table-cell table:style-name="Table15.A1" office:value-type="string">
                  <text:p text:style-name="Standard">to Colette</text:p>
                  <text:p text:style-name="Standard"><draw:frame draw:style-name="fr1" draw:name="image7.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Thank you, extra hour is $159. </text:p>
      <text:p text:style-name="Standard"><draw:frame draw:style-name="fr1" draw:name="image30.png" text:anchor-type="as-char" svg:width="0.8335in" svg:height="0.8335in" draw:z-index="0"><draw:image xlink:href="Pictures/100000000000005000000050276884CD8BB0CFB9.png" xlink:type="simple" xlink:show="embed" xlink:actuate="onLoad" loext:mime-type="image/png"/></draw:frame></text:p>
      <table:table table:name="Table19" table:style-name="Table19">
        <table:table-column table:style-name="Table19.A"/>
        <table:table-column table:style-name="Table19.B"/>
        <table:table-column table:style-name="Table19.C" table:number-columns-repeated="2"/>
        <table:table-row table:style-name="Table19.1">
          <table:table-cell table:style-name="Table19.A1" office:value-type="string">
            <text:p text:style-name="Standard"/>
            <table:table table:name="Table17" table:style-name="Table17">
              <table:table-column table:style-name="Table17.A"/>
              <table:table-row table:style-name="Table17.1">
                <table:table-cell table:style-name="Table17.A1" office:value-type="string">
                  <text:p text:style-name="P50"><text:bookmark text:name="_jd8k5empxwkq"/><text:span text:style-name="T14">Colette GODFREY</text:span></text:p>
                </table:table-cell>
              </table:table-row>
            </table:table>
            <text:p text:style-name="Standard"/>
          </table:table-cell>
          <table:table-cell table:style-name="Table19.A1" office:value-type="string">
            <text:p text:style-name="Standard">Wed, Jul 8, 3:58 PM (2 days ago)</text:p>
          </table:table-cell>
          <table:table-cell table:style-name="Table19.A1" office:value-type="string">
            <text:p text:style-name="Standard"/>
          </table:table-cell>
          <table:table-cell table:style-name="Table19.A1" table:number-rows-spanned="2" office:value-type="string">
            <text:p text:style-name="Standard"/>
          </table:table-cell>
        </table:table-row>
        <table:table-row table:style-name="Table19.2">
          <table:table-cell table:style-name="Table19.A1" table:number-columns-spanned="3" office:value-type="string">
            <text:p text:style-name="Standard"/>
            <table:table table:name="Table18" table:style-name="Table18">
              <table:table-column table:style-name="Table18.A"/>
              <table:table-row table:style-name="Table18.1">
                <table:table-cell table:style-name="Table18.A1" office:value-type="string">
                  <text:p text:style-name="Standard">to me</text:p>
                  <text:p text:style-name="Standard"><draw:frame draw:style-name="fr1" draw:name="image12.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In looking at the stuff. I really can’t tell you what’s going and what’s not because all of it won’t fit on this truck so just send me 2 strong guys - stairs won’t be an issue that’s about all I can tell you. Plus there will be a lot of boxes that are fragile with china and glass ware . </text:p>
      <text:p text:style-name="Standard">Is it 159$ per person? </text:p>
      <text:p text:style-name="Standard">Can we extend at the time if we think we need to? Can we just extend with one person rather than 2? </text:p>
      <text:p text:style-name="Standard">Sent from my iPhone</text:p>
      <text:p text:style-name="Standard"/>
      <text:p text:style-name="P46">On Jul 8, 2026, at 11:16 AM, DC Top Choice Movers &lt;dctopchoicemovers@gmail.com&gt; wrote:</text:p>
      <text:p text:style-name="Standard"><draw:frame draw:style-name="fr1" draw:name="image16.jpg" text:anchor-type="as-char" svg:width="0.8335in" svg:height="0.8335in" draw:z-index="0"><draw:image xlink:href="Pictures/100000000000005000000050619D9736512D237D.jpg" xlink:type="simple" xlink:show="embed" xlink:actuate="onLoad" loext:mime-type="image/jpeg"/></draw:frame></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Standard"/>
            <table:table table:name="Table20" table:style-name="Table20">
              <table:table-column table:style-name="Table20.A"/>
              <table:table-row table:style-name="Table20.1">
                <table:table-cell table:style-name="Table20.A1" office:value-type="string">
                  <text:p text:style-name="P50"><text:bookmark text:name="_kuqav3yf3abm"/><text:span text:style-name="T14">DC Top Choice Movers &lt;dctopchoicemovers@gmail.com&gt;</text:span></text:p>
                </table:table-cell>
              </table:table-row>
            </table:table>
            <text:p text:style-name="Standard"/>
          </table:table-cell>
          <table:table-cell table:style-name="Table22.A1" office:value-type="string">
            <text:p text:style-name="Standard">Wed, Jul 8, 5:46 PM (2 days ago)</text:p>
          </table:table-cell>
          <table:table-cell table:style-name="Table22.A1" office:value-type="string">
            <text:p text:style-name="Standard"/>
          </table:table-cell>
          <table:table-cell table:style-name="Table22.A1" table:number-rows-spanned="2" office:value-type="string">
            <text:p text:style-name="Standard"/>
          </table:table-cell>
        </table:table-row>
        <table:table-row table:style-name="Table22.2">
          <table:table-cell table:style-name="Table22.A1" table:number-columns-spanned="3" office:value-type="string">
            <text:p text:style-name="Standard"/>
            <table:table table:name="Table21" table:style-name="Table21">
              <table:table-column table:style-name="Table21.A"/>
              <table:table-row table:style-name="Table21.1">
                <table:table-cell table:style-name="Table21.A1" office:value-type="string">
                  <text:p text:style-name="Standard">to Colette</text:p>
                  <text:p text:style-name="Standard"><draw:frame draw:style-name="fr1" draw:name="image15.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HIi Colette, </text:p>
      <text:p text:style-name="Standard"/>
      <text:p text:style-name="Standard">It is $159 for 2 movers, we don't extend service with just 1 mover. Confirming your job tomorrow at 2 pm. </text:p>
      <text:p text:style-name="Standard"/>
      <text:p text:style-name="Standard">Below is our advice on pads again, as they are so important to have even if we are just unloading you make sure you have them for your load.</text:p>
      <text:p text:style-name="Standard"/>
      <text:p text:style-name="Standard">Payment:</text:p>
      <text:p text:style-name="Standard">You paid Moving Helper for the time you selected and in return they gave you a “payment code” (6 digits all numbers) for you to give to us. We enter this code on our side to show we have completed your job and get our percentage released to us. If you have it ready to give the guys when they are done helping you we would really appreciate it. It is very easy to retrieve code by calling 1-866-748-4110 and pressing 2 and 1 to hear a recording of the code. Thank you.·</text:p>
      <text:p text:style-name="Standard"/>
      <text:p text:style-name="Standard"><text:s/></text:p>
      <text:p text:style-name="Standard">Pads:</text:p>
      <text:p text:style-name="Standard">Furniture pads, which you can rent when you rent truck then, are very important to protect everything. I recommend counting all your pieces of furniture down to the smallest end table, then add pictures, mirrors and multiply that by 1.25 as some things like the couch and dresser take 2 pads. We can improvise with your blankets, sheets, etc to protect furniture, but everything must be covered to prevent friction damage (scratches) during drive. Always better to have extra pads scratched furniture.</text:p>
      <text:p text:style-name="P48"><text:bookmark text:name="_kpbvqbhvagl1"/><text:span text:style-name="T15">7/9(AM): Your 2 man, 2 hour moving job in 6225 Rathlin Dr Springfield, VA 22152-2156 Chris Walton (703) 618-8556 | walton.chris@gmail.com</text:span></text:p>
      <text:p text:style-name="Standard">Inbox</text:p>
      <text:p text:style-name="Standard"><draw:frame draw:style-name="fr1" draw:name="image19.jpg" text:anchor-type="as-char" svg:width="0.8335in" svg:height="0.8335in" draw:z-index="0"><draw:image xlink:href="Pictures/100000000000005000000050619D9736512D237D.jpg" xlink:type="simple" xlink:show="embed" xlink:actuate="onLoad" loext:mime-type="image/jpeg"/></draw:frame></text:p>
      <table:table table:name="Table25" table:style-name="Table25">
        <table:table-column table:style-name="Table25.A"/>
        <table:table-column table:style-name="Table25.B"/>
        <table:table-column table:style-name="Table25.C" table:number-columns-repeated="2"/>
        <table:table-row table:style-name="Table25.1">
          <table:table-cell table:style-name="Table25.A1" office:value-type="string">
            <text:p text:style-name="Standard"/>
            <table:table table:name="Table23" table:style-name="Table23">
              <table:table-column table:style-name="Table23.A"/>
              <table:table-row table:style-name="Table23.1">
                <table:table-cell table:style-name="Table23.A1" office:value-type="string">
                  <text:p text:style-name="P50"><text:bookmark text:name="_ekmcnwrzrmbj"/><text:span text:style-name="T14">DC Top Choice Movers &lt;dctopchoicemovers@gmail.com&gt;</text:span></text:p>
                </table:table-cell>
              </table:table-row>
            </table:table>
            <text:p text:style-name="Standard"/>
          </table:table-cell>
          <table:table-cell table:style-name="Table25.A1" office:value-type="string">
            <text:p text:style-name="Standard">Mon, Jul 6, 1:40 PM (4 days ago)</text:p>
          </table:table-cell>
          <table:table-cell table:style-name="Table25.A1" office:value-type="string">
            <text:p text:style-name="Standard"/>
          </table:table-cell>
          <table:table-cell table:style-name="Table25.A1" table:number-rows-spanned="2" office:value-type="string">
            <text:p text:style-name="Standard"/>
          </table:table-cell>
        </table:table-row>
        <table:table-row table:style-name="Table25.2">
          <table:table-cell table:style-name="Table25.A1" table:number-columns-spanned="3" office:value-type="string">
            <text:p text:style-name="Standard"/>
            <table:table table:name="Table24" table:style-name="Table24">
              <table:table-column table:style-name="Table24.A"/>
              <table:table-row table:style-name="Table24.1">
                <table:table-cell table:style-name="Table24.A1" office:value-type="string">
                  <text:p text:style-name="Standard">to walton.chris</text:p>
                  <text:p text:style-name="Standard"><draw:frame draw:style-name="fr1" draw:name="image6.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P31">Hi there,</text:p>
      <text:p text:style-name="P31">I help Robin through email and wanted to send you an introductory message since he cannot call you right now. If you could please answer the questions below, I can get your move all set up.</text:p>
      <text:p text:style-name="P31">Thanks -- Aubrey</text:p>
      <text:p text:style-name="Standard"><draw:rect text:anchor-type="as-char" style:rel-width="100%" draw:z-index="6" draw:style-name="gr1" draw:text-style-name="P51" svg:width="0.0012in" svg:height="0.0213in"><text:p/></draw:rect></text:p>
      <text:p text:style-name="P31"><text:span text:style-name="T7">Automated Message:</text:span></text:p>
      <text:p text:style-name="P31">Robin from DC Top Choice Movers here. I am currently on a job but wanted to touch base with you about your upcoming move. Is email a good way to gather information about your move so we can help you? We really appreciate it if you can email us some details. If we need to talk, I will make time when I am not working with another customer. Thank you.</text:p>
      <text:p text:style-name="P31">Any information you can provide by email is greatly appreciated. While I may not have time to return voicemails until after jobs are complete, I try to respond to emails during lunch breaks or whenever I have a chance, whether late at night or early in the morning. Additionally, I have an assistant and a family member who help with emails, so you often get a fast response.</text:p>
      <text:p text:style-name="P31">I do try to return voicemails within 24 hours, but I greatly appreciate email communication.</text:p>
      <text:p text:style-name="P31">-- Robin</text:p>
      <text:p text:style-name="P31"><text:a xlink:type="simple" xlink:href="http://www.dctopchoicemovers.com" text:style-name="ListLabel_20_83" text:visited-style-name="ListLabel_20_83"><text:span text:style-name="T4">www.DCTopChoiceMovers.com</text:span></text:a></text:p>
      <text:p text:style-name="P31">703-679-7761</text:p>
      <text:p text:style-name="Standard"><draw:rect text:anchor-type="as-char" style:rel-width="100%" draw:z-index="7" draw:style-name="gr1" draw:text-style-name="P51" svg:width="0.0012in" svg:height="0.0213in"><text:p/></draw:rect></text:p>
      <text:p text:style-name="P31"><text:soft-page-break/><text:span text:style-name="T7">The info that we already have:</text:span></text:p>
      <text:p text:style-name="P32"><text:span text:style-name="T8">Customer Notes</text:span></text:p>
      <text:p text:style-name="P34"><text:span text:style-name="T9">Studio to 1 Bedroom Apt. - 1 flights of stairs.<text:line-break/>Loading a king size mattress, small sofa cabinet and boxes into ‘15 foot U-Haul truck</text:span></text:p>
      <text:p text:style-name="P49"><text:bookmark text:name="_hpac4z5oh4ns"/><text:span text:style-name="T10">Item Descriptions / Photos</text:span></text:p>
      <text:p text:style-name="P33"><text:a xlink:type="simple" xlink:href="https://www.movinghelper.com/Jobs/JobItems/fb8b45e6-79a0-41b7-9e74-3cfa4908fbec" text:style-name="ListLabel_20_84" text:visited-style-name="ListLabel_20_84"><text:span text:style-name="T11">Add/View </text:span></text:a></text:p>
      <text:p text:style-name="P32"><text:span text:style-name="T9">Service Provider - Saved Items: 0 /20</text:span></text:p>
      <text:p text:style-name="P32"><text:span text:style-name="T9">Customer - Saved Items: 0 /10</text:span></text:p>
      <text:p text:style-name="P49"><text:bookmark text:name="_7t12b4sl3saw"/><text:span text:style-name="T10">Payment Code</text:span></text:p>
      <text:p text:style-name="P35"><text:span text:style-name="T9"><text:s/>This job is scheduled for a future date. Entering payment code prior to job completion is a violation of the Moving Helper agreement and could result in deactivation. If the job has been completed, would you like to proceed with inputting this payment code?<text:line-break/></text:span><text:span text:style-name="T12">Yes</text:span><text:span text:style-name="T9"> </text:span><text:span text:style-name="T11">No</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text:span text:style-name="T8">Load/Unload - JB-fb8b45e6</text:span></text:p>
          </table:table-cell>
          <table:covered-table-cell/>
          <table:covered-table-cell/>
          <table:covered-table-cell/>
          <table:covered-table-cell/>
        </table:table-row>
        <table:table-row table:style-name="Table26.2">
          <table:table-cell table:style-name="Table26.A1" office:value-type="string">
            <text:p text:style-name="P4"><text:span text:style-name="T9">07/09/2026</text:span></text:p>
            <text:p text:style-name="P4"><text:span text:style-name="T9">Afternoon</text:span></text:p>
            <text:p text:style-name="P4"><text:a xlink:type="simple" xlink:href="https://www.movinghelper.com/Jobs/Week?WeekStart=2026-07-05" text:style-name="ListLabel_20_84" text:visited-style-name="ListLabel_20_84"><text:span text:style-name="T11">view on calendar</text:span></text:a></text:p>
            <text:p text:style-name="P36"><text:a xlink:type="simple" xlink:href="https://www.movinghelper.com/Jobs/Details/fb8b45e6-79a0-41b7-9e74-3cfa4908fbec#" text:style-name="ListLabel_20_84" text:visited-style-name="ListLabel_20_84"><text:span text:style-name="T11">Reschedule</text:span></text:a></text:p>
          </table:table-cell>
          <table:table-cell table:style-name="Table26.A1" office:value-type="string">
            <text:p text:style-name="P4"><text:span text:style-name="T9">Chris Walton</text:span></text:p>
            <text:p text:style-name="P4"><text:span text:style-name="T9">6225 Rathlin Dr</text:span></text:p>
            <text:p text:style-name="P4"><text:span text:style-name="T9">Springfield, VA 22152-2156</text:span></text:p>
            <text:p text:style-name="P4"><text:a xlink:type="simple" xlink:href="https://www.movinghelper.com/Maps/Job/fb8b45e6-79a0-41b7-9e74-3cfa4908fbec" text:style-name="ListLabel_20_84" text:visited-style-name="ListLabel_20_84"><text:span text:style-name="T11">view on map / change address</text:span></text:a></text:p>
          </table:table-cell>
          <table:table-cell table:style-name="Table26.A1" office:value-type="string">
            <text:p text:style-name="P4"><text:span text:style-name="T9">2 person crew</text:span></text:p>
            <text:p text:style-name="P4"><text:span text:style-name="T9">2 hours</text:span></text:p>
          </table:table-cell>
          <table:table-cell table:style-name="Table26.A1" office:value-type="string">
            <text:p text:style-name="P5"/>
          </table:table-cell>
          <table:table-cell table:style-name="Table26.A1" office:value-type="string">
            <text:p text:style-name="P4"><text:span text:style-name="T9">Total: $318.00</text:span></text:p>
          </table:table-cell>
        </table:table-row>
        <table:table-row table:style-name="Table26.1">
          <table:table-cell table:style-name="Table26.A1" table:number-columns-spanned="4" office:value-type="string">
            <text:p text:style-name="P4"><text:span text:style-name="T8">Order total:</text:span></text:p>
          </table:table-cell>
          <table:covered-table-cell/>
          <table:covered-table-cell/>
          <table:covered-table-cell/>
          <table:table-cell table:style-name="Table26.A1" office:value-type="string">
            <text:p text:style-name="P4"><text:span text:style-name="T8">USD $318.00</text:span></text:p>
          </table:table-cell>
        </table:table-row>
      </table:table>
      <text:p text:style-name="P31"><text:span text:style-name="T7">The info that will help your move go smoothly and efficiently:</text:span></text:p>
      <text:list xml:id="list1934516356" text:style-name="WWNum2">
        <text:list-item>
          <text:p text:style-name="P13"><text:span text:style-name="T7">Preferred Timeframes:</text:span></text:p>
          <text:list>
            <text:list-item>
              <text:p text:style-name="P39">On weekdays, we offer start times of 8 AM, 9 AM or 10 AM or afternoon start times of 1 PM, 2 PM, or 3 PM.</text:p>
            </text:list-item>
            <text:list-item>
              <text:p text:style-name="P39">We don't subcontract and only use our own set of movers, so on weekends and short notice, we may have limited availability. If possible, please give us more than one preferred time or a window that will work for you, and we will do our best to accommodate.</text:p>
            </text:list-item>
            <text:list-item>
              <text:p text:style-name="P39">Please provide a 30-minute arrival window to account for DC area traffic. If you are on a tight schedule, let us know so we can plan to arrive early.</text:p>
            </text:list-item>
          </text:list>
        </text:list-item>
        <text:list-item>
          <text:p text:style-name="P22"><text:span text:style-name="T7">The Basics:</text:span></text:p>
          <text:list>
            <text:list-item>
              <text:p text:style-name="P39">A quick list of furniture and items, as well as an estimate of the number and size of totes or boxes, is very helpful. This helps us ensure you have the right size truck and avoid additional costs.</text:p>
            </text:list-item>
            <text:list-item>
              <text:p text:style-name="P39">Are we loading, unloading, or both?</text:p>
            </text:list-item>
            <text:list-item>
              <text:p text:style-name="P39">The address(es) we will be helping at.</text:p>
            </text:list-item>
            <text:list-item>
              <text:p text:style-name="P39">Will there be any extremely large or delicate furniture or other items that require more than a furniture pad?</text:p>
            </text:list-item>
            <text:list-item>
              <text:p text:style-name="P39">What is your heaviest item? </text:p>
            </text:list-item>
            <text:list-item>
              <text:p text:style-name="P39">Is there anything over 125/150 lbs that will need to go up or down stairs?</text:p>
            </text:list-item>
            <text:list-item>
              <text:p text:style-name="P39">Will you need help with any assembly or disassembly?</text:p>
            </text:list-item>
            <text:list-item>
              <text:p text:style-name="P39">What size is your truck, and if we are loading, how many pads did you rent?</text:p>
            </text:list-item>
            <text:list-item>
              <text:p text:style-name="P43">Does the terrain present special challenges (stairs, elevators, long hallways, hills, narrow or uneven walks)?</text:p>
            </text:list-item>
          </text:list>
        </text:list-item>
      </text:list>
      <text:p text:style-name="P31">Providing this information allows us to plan for any unexpected obstacles and ensure a smooth move. If you are unsure how long your job will take, we can estimate the time needed with the above details. If you are unable to provide this information, please allow us to schedule you as the second job in the afternoon so you can have your team for as long as necessary.</text:p>
      <text:p text:style-name="Standard"><draw:rect text:anchor-type="as-char" style:rel-width="100%" draw:z-index="8" draw:style-name="gr1" draw:text-style-name="P51" svg:width="0.0012in" svg:height="0.0213in"><text:p/></draw:rect></text:p>
      <text:p text:style-name="P31"><text:span text:style-name="T7">Additional useful info:</text:span></text:p>
      <text:list xml:id="list2356056964" text:style-name="WWNum3">
        <text:list-item>
          <text:p text:style-name="P14"><text:span text:style-name="T7">Pads:</text:span></text:p>
          <text:list>
            <text:list-item>
              <text:p text:style-name="P40">Furniture pads, which you can rent when you rent a truck, are crucial for protecting your items. I recommend counting all your pieces of furniture, including small items, pictures, and mirrors, and multiplying that number by 1.25. This accounts for items like couches and dressers that require two pads. We can improvise with your blankets, sheets, etc., but everything must be covered to prevent friction damage during the drive.</text:p>
            </text:list-item>
          </text:list>
        </text:list-item>
        <text:list-item>
          <text:p text:style-name="P23"><text:span text:style-name="T7">Payment:</text:span></text:p>
          <text:list>
            <text:list-item>
              <text:p text:style-name="P40">You paid Moving Helper for the time you selected, and they provided you with a “payment code” (6 digits, all numbers). Please have this code ready for us when the job is complete, so we can enter it and receive our payment. If you need to retrieve the code, call 1-866-748-4110 and follow the prompts. Having this code ready is greatly appreciated.</text:p>
            </text:list-item>
          </text:list>
        </text:list-item>
        <text:list-item>
          <text:p text:style-name="P23"><text:span text:style-name="T7">Additional Time:</text:span></text:p>
          <text:list>
            <text:list-item>
              <text:p text:style-name="P40">If you need more time, you can call Moving Helper to add more hours. They round up to the nearest hour. Alternatively, we can accept payment directly if you prefer, and we can prorate the time, so you only pay for the time you use. If you think you will need more time than you booked, please let us know so we can block off enough time.</text:p>
            </text:list-item>
          </text:list>
        </text:list-item>
        <text:list-item>
          <text:p text:style-name="P23"><text:span text:style-name="T7">Truck Size:</text:span></text:p>
          <text:list>
            <text:list-item>
              <text:p text:style-name="P44">Renting a truck one size larger than recommended ensures everything fits and reduces stress. It also allows us to pack the truck more efficiently, saving time and money.</text:p>
            </text:list-item>
          </text:list>
        </text:list-item>
      </text:list>
      <text:p text:style-name="Standard"><draw:rect text:anchor-type="as-char" style:rel-width="100%" draw:z-index="9" draw:style-name="gr1" draw:text-style-name="P51" svg:width="0.0012in" svg:height="0.0213in"><text:p/></draw:rect></text:p>
      <text:p text:style-name="P31"><text:span text:style-name="T7">Equipment Checklist:</text:span></text:p>
      <text:list xml:id="list3028190061" text:style-name="WWNum9">
        <text:list-item>
          <text:p text:style-name="P15"><text:span text:style-name="T7">Furniture pads</text:span> are the #1 tool we need for a safe load. Use 1.25 pads per item of furniture.</text:p>
        </text:list-item>
        <text:list-item>
          <text:p text:style-name="P24"><text:span text:style-name="T7">Rope, bungees, or ratchet straps</text:span> are essential for securing items. Ratchet straps are preferred for their ability to hold a load securely.</text:p>
        </text:list-item>
        <text:list-item>
          <text:p text:style-name="P24"><text:span text:style-name="T7">Dollies</text:span> are useful for ground floor and elevator moves but not for stair moves. Heavy items should be in small boxes to ensure safety and ease of carrying.</text:p>
        </text:list-item>
        <text:list-item>
          <text:p text:style-name="P29"><text:span text:style-name="T7">Shrink wrap or tape</text:span> helps keep drawers from opening and secures blankets. If unavailable, we can remove drawers and carefully carry furniture to the truck, where we will drape furniture pads over everything.</text:p>
        </text:list-item>
      </text:list>
      <text:p text:style-name="P31">We are professional movers and have a few tricks up our sleeves to go above and beyond for our customers. However, due to our contract as "labor only" with U-Haul, we are prohibited from providing any equipment. We know how to use it, though! If you prefer to buy rather than rent any equipment, we can provide links to the least expensive options online.</text:p>
      <text:p text:style-name="P31">Thanks, and good luck with all the preparations and packing.</text:p>
      <text:p text:style-name="Standard"><draw:rect text:anchor-type="as-char" style:rel-width="100%" draw:z-index="10" draw:style-name="gr1" draw:text-style-name="P51" svg:width="0.0012in" svg:height="0.0213in"><text:p/></draw:rect></text:p>
      <text:p text:style-name="P31">-- Robin</text:p>
      <text:p text:style-name="P31"><text:a xlink:type="simple" xlink:href="http://www.dctopchoicemovers.com" text:style-name="ListLabel_20_83" text:visited-style-name="ListLabel_20_83"><text:span text:style-name="T4">www.DCTopChoiceMovers.com</text:span></text:a></text:p>
      <text:p text:style-name="P31">703-679-7761</text:p>
      <text:p text:style-name="P45"/>
      <text:p text:style-name="Standard"/>
      <text:p text:style-name="P45"/>
      <text:p text:style-name="Standard"><draw:frame draw:style-name="fr1" draw:name="image24.jpg" text:anchor-type="as-char" svg:width="0.8335in" svg:height="0.8335in" draw:z-index="0"><draw:image xlink:href="Pictures/100000000000005000000050619D9736512D237D.jpg" xlink:type="simple" xlink:show="embed" xlink:actuate="onLoad" loext:mime-type="image/jpeg"/></draw:frame></text:p>
      <table:table table:name="Table29" table:style-name="Table29">
        <table:table-column table:style-name="Table29.A"/>
        <table:table-column table:style-name="Table29.B"/>
        <table:table-column table:style-name="Table29.C" table:number-columns-repeated="2"/>
        <text:soft-page-break/>
        <table:table-row table:style-name="Table29.1">
          <table:table-cell table:style-name="Table29.A1" office:value-type="string">
            <text:p text:style-name="P6"/>
            <table:table table:name="Table27" table:style-name="Table27">
              <table:table-column table:style-name="Table27.A"/>
              <table:table-row table:style-name="Table27.1">
                <table:table-cell table:style-name="Table27.A1" office:value-type="string">
                  <text:p text:style-name="P50"><text:bookmark text:name="_clo1526115cz"/><text:span text:style-name="T14">DC Top Choice Movers &lt;dctopchoicemovers@gmail.com&gt;</text:span></text:p>
                </table:table-cell>
              </table:table-row>
            </table:table>
            <text:p text:style-name="Standard"/>
          </table:table-cell>
          <table:table-cell table:style-name="Table29.A1" office:value-type="string">
            <text:p text:style-name="Standard">Tue, Jul 7, 2:57 PM (3 days ago)</text:p>
          </table:table-cell>
          <table:table-cell table:style-name="Table29.A1" office:value-type="string">
            <text:p text:style-name="Standard"/>
          </table:table-cell>
          <table:table-cell table:style-name="Table29.A1" table:number-rows-spanned="2" office:value-type="string">
            <text:p text:style-name="Standard"/>
          </table:table-cell>
        </table:table-row>
        <table:table-row table:style-name="Table29.2">
          <table:table-cell table:style-name="Table29.A1" table:number-columns-spanned="3" office:value-type="string">
            <text:p text:style-name="Standard"/>
            <table:table table:name="Table28" table:style-name="Table28">
              <table:table-column table:style-name="Table28.A"/>
              <table:table-row table:style-name="Table28.1">
                <table:table-cell table:style-name="Table28.A1" office:value-type="string">
                  <text:p text:style-name="Standard">to walton.chris</text:p>
                  <text:p text:style-name="Standard"><draw:frame draw:style-name="fr1" draw:name="image4.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Hi there, we are setting up your move, please let us know:</text:p>
      <text:list xml:id="list2953243397" text:style-name="WWNum7">
        <text:list-item>
          <text:p text:style-name="P16">size of your moving truck</text:p>
        </text:list-item>
        <text:list-item>
          <text:p text:style-name="P25">addresses and will we help you load, unload or both</text:p>
        </text:list-item>
        <text:list-item>
          <text:p text:style-name="P25">inventory or at least a bedroom count and basic estimate so we can be prepared</text:p>
        </text:list-item>
        <text:list-item>
          <text:p text:style-name="P25">any oversize or super delicate items, anything over 225 lbs</text:p>
        </text:list-item>
        <text:list-item>
          <text:p text:style-name="P25">will you want help with breakdown or assembly</text:p>
        </text:list-item>
        <text:list-item>
          <text:p text:style-name="P25">any info about stairs, elevators, or long walks</text:p>
        </text:list-item>
        <text:list-item>
          <text:p text:style-name="P30">possible times we can help you, so we can get you on schedule :) </text:p>
        </text:list-item>
      </text:list>
      <text:p text:style-name="Standard">Thank you. Aubrey (for Robin) </text:p>
      <text:p text:style-name="Standard"><draw:frame draw:style-name="fr1" draw:name="image26.png" text:anchor-type="as-char" svg:width="0.8335in" svg:height="0.8335in" draw:z-index="0"><draw:image xlink:href="Pictures/100000000000005000000050B53AD838CB123376.png" xlink:type="simple" xlink:show="embed" xlink:actuate="onLoad" loext:mime-type="image/png"/></draw:frame></text:p>
      <table:table table:name="Table32" table:style-name="Table32">
        <table:table-column table:style-name="Table32.A"/>
        <table:table-column table:style-name="Table32.B"/>
        <table:table-column table:style-name="Table32.C" table:number-columns-repeated="2"/>
        <table:table-row table:style-name="Table32.1">
          <table:table-cell table:style-name="Table32.A1" office:value-type="string">
            <text:p text:style-name="Standard"/>
            <table:table table:name="Table30" table:style-name="Table30">
              <table:table-column table:style-name="Table30.A"/>
              <table:table-row table:style-name="Table30.1">
                <table:table-cell table:style-name="Table30.A1" office:value-type="string">
                  <text:p text:style-name="P50"><text:bookmark text:name="_bxatfynb0s5o"/><text:span text:style-name="T14">Chris Walton</text:span></text:p>
                </table:table-cell>
              </table:table-row>
            </table:table>
            <text:p text:style-name="Standard"/>
          </table:table-cell>
          <table:table-cell table:style-name="Table32.A1" office:value-type="string">
            <text:p text:style-name="Standard">Tue, Jul 7, 3:24 PM (3 days ago)</text:p>
          </table:table-cell>
          <table:table-cell table:style-name="Table32.A1" office:value-type="string">
            <text:p text:style-name="Standard"/>
          </table:table-cell>
          <table:table-cell table:style-name="Table32.A1" table:number-rows-spanned="2" office:value-type="string">
            <text:p text:style-name="Standard"/>
          </table:table-cell>
        </table:table-row>
        <table:table-row table:style-name="Table32.2">
          <table:table-cell table:style-name="Table32.A1" table:number-columns-spanned="3" office:value-type="string">
            <text:p text:style-name="Standard"/>
            <table:table table:name="Table31" table:style-name="Table31">
              <table:table-column table:style-name="Table31.A"/>
              <table:table-row table:style-name="Table31.1">
                <table:table-cell table:style-name="Table31.A1" office:value-type="string">
                  <text:p text:style-name="Standard">to me</text:p>
                  <text:p text:style-name="Standard"><draw:frame draw:style-name="fr1" draw:name="image9.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We have a 15’ U-Haul truck. It will be partially loaded from an earlier load at a different address. </text:p>
      <text:p text:style-name="Standard"/>
      <text:p text:style-name="Standard">It will be load only. King and twin mattress from second floor. Small cabinet and packed boxes. load with only a few large </text:p>
      <text:p text:style-name="Standard"><text:s/>6223 Rathlin Dr </text:p>
      <text:p text:style-name="Standard">Springfield <text:s/>Va 22152</text:p>
      <text:p text:style-name="Standard">United States </text:p>
      <text:p text:style-name="Standard"/>
      <text:p text:style-name="Standard">703-618-8556</text:p>
      <text:p text:style-name="Standard"/>
      <text:p text:style-name="Standard"/>
      <text:p text:style-name="P46">2:57 PM, DC Top Choice Movers &lt;dctopchoicemovers@gmail.com&gt; wrote:</text:p>
      <text:p text:style-name="Standard"><draw:frame draw:style-name="fr1" draw:name="image23.jpg" text:anchor-type="as-char" svg:width="0.8335in" svg:height="0.8335in" draw:z-index="0"><draw:image xlink:href="Pictures/100000000000005000000050619D9736512D237D.jpg" xlink:type="simple" xlink:show="embed" xlink:actuate="onLoad" loext:mime-type="image/jpeg"/></draw:frame></text:p>
      <table:table table:name="Table35" table:style-name="Table35">
        <table:table-column table:style-name="Table35.A"/>
        <table:table-column table:style-name="Table35.B"/>
        <table:table-column table:style-name="Table35.C" table:number-columns-repeated="2"/>
        <table:table-row table:style-name="Table35.1">
          <table:table-cell table:style-name="Table35.A1" office:value-type="string">
            <text:p text:style-name="Standard"/>
            <table:table table:name="Table33" table:style-name="Table33">
              <table:table-column table:style-name="Table33.A"/>
              <table:table-row table:style-name="Table33.1">
                <table:table-cell table:style-name="Table33.A1" office:value-type="string">
                  <text:p text:style-name="P50"><text:bookmark text:name="_jkr5no2q16v0"/><text:span text:style-name="T14">DC Top Choice Movers &lt;dctopchoicemovers@gmail.com&gt;</text:span></text:p>
                </table:table-cell>
              </table:table-row>
            </table:table>
            <text:p text:style-name="Standard"/>
          </table:table-cell>
          <table:table-cell table:style-name="Table35.A1" office:value-type="string">
            <text:p text:style-name="Standard">Tue, Jul 7, 8:07 PM (3 days ago)</text:p>
          </table:table-cell>
          <table:table-cell table:style-name="Table35.A1" office:value-type="string">
            <text:p text:style-name="Standard"/>
          </table:table-cell>
          <table:table-cell table:style-name="Table35.A1" table:number-rows-spanned="2" office:value-type="string">
            <text:p text:style-name="Standard"/>
          </table:table-cell>
        </table:table-row>
        <table:table-row table:style-name="Table35.2">
          <table:table-cell table:style-name="Table35.A1" table:number-columns-spanned="3" office:value-type="string">
            <text:p text:style-name="Standard"/>
            <table:table table:name="Table34" table:style-name="Table34">
              <table:table-column table:style-name="Table34.A"/>
              <table:table-row table:style-name="Table34.1">
                <table:table-cell table:style-name="Table34.A1" office:value-type="string">
                  <text:p text:style-name="Standard">to Chris</text:p>
                  <text:p text:style-name="Standard"><draw:frame draw:style-name="fr1" draw:name="image5.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Hi Chris, </text:p>
      <text:p text:style-name="Standard"/>
      <text:p text:style-name="Standard">What time works for you? </text:p>
      <text:p text:style-name="Standard"><draw:frame draw:style-name="fr1" draw:name="image25.jpg" text:anchor-type="as-char" svg:width="0.8335in" svg:height="0.8335in" draw:z-index="0"><draw:image xlink:href="Pictures/100000000000005000000050619D9736512D237D.jpg" xlink:type="simple" xlink:show="embed" xlink:actuate="onLoad" loext:mime-type="image/jpeg"/></draw:frame></text:p>
      <table:table table:name="Table38" table:style-name="Table38">
        <table:table-column table:style-name="Table38.A"/>
        <table:table-column table:style-name="Table38.B"/>
        <table:table-column table:style-name="Table38.C" table:number-columns-repeated="2"/>
        <table:table-row table:style-name="Table38.1">
          <table:table-cell table:style-name="Table38.A1" office:value-type="string">
            <text:p text:style-name="Standard"/>
            <table:table table:name="Table36" table:style-name="Table36">
              <table:table-column table:style-name="Table36.A"/>
              <table:table-row table:style-name="Table36.1">
                <table:table-cell table:style-name="Table36.A1" office:value-type="string">
                  <text:p text:style-name="P50"><text:bookmark text:name="_jpvtw8rgn0p7"/><text:span text:style-name="T14">DC Top Choice Movers &lt;dctopchoicemovers@gmail.com&gt;</text:span></text:p>
                </table:table-cell>
              </table:table-row>
            </table:table>
            <text:p text:style-name="Standard"/>
          </table:table-cell>
          <table:table-cell table:style-name="Table38.A1" office:value-type="string">
            <text:p text:style-name="Standard">Wed, Jul 8, 11:21 AM (2 days ago)</text:p>
          </table:table-cell>
          <table:table-cell table:style-name="Table38.A1" office:value-type="string">
            <text:p text:style-name="Standard"/>
          </table:table-cell>
          <table:table-cell table:style-name="Table38.A1" table:number-rows-spanned="2" office:value-type="string">
            <text:p text:style-name="Standard"/>
          </table:table-cell>
        </table:table-row>
        <table:table-row table:style-name="Table38.2">
          <table:table-cell table:style-name="Table38.A1" table:number-columns-spanned="3" office:value-type="string">
            <text:p text:style-name="Standard"/>
            <table:table table:name="Table37" table:style-name="Table37">
              <table:table-column table:style-name="Table37.A"/>
              <table:table-row table:style-name="Table37.1">
                <table:table-cell table:style-name="Table37.A1" office:value-type="string">
                  <text:p text:style-name="Standard">to Chris</text:p>
                  <text:p text:style-name="Standard"><draw:frame draw:style-name="fr1" draw:name="image14.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We can do 10 am for you if that works. </text:p>
      <text:p text:style-name="Standard"><draw:frame draw:style-name="fr1" draw:name="image18.png" text:anchor-type="as-char" svg:width="0.8335in" svg:height="0.8335in" draw:z-index="0"><draw:image xlink:href="Pictures/100000000000005000000050B53AD838CB123376.png" xlink:type="simple" xlink:show="embed" xlink:actuate="onLoad" loext:mime-type="image/png"/></draw:frame></text:p>
      <table:table table:name="Table41" table:style-name="Table41">
        <table:table-column table:style-name="Table41.A"/>
        <table:table-column table:style-name="Table41.B"/>
        <table:table-column table:style-name="Table41.C" table:number-columns-repeated="2"/>
        <table:table-row table:style-name="Table41.1">
          <table:table-cell table:style-name="Table41.A1" office:value-type="string">
            <text:p text:style-name="Standard"/>
            <table:table table:name="Table39" table:style-name="Table39">
              <table:table-column table:style-name="Table39.A"/>
              <table:table-row table:style-name="Table39.1">
                <table:table-cell table:style-name="Table39.A1" office:value-type="string">
                  <text:p text:style-name="P50"><text:bookmark text:name="_5s2pqit3hd7n"/><text:span text:style-name="T14">Chris Walton</text:span></text:p>
                </table:table-cell>
              </table:table-row>
            </table:table>
            <text:p text:style-name="Standard"/>
          </table:table-cell>
          <table:table-cell table:style-name="Table41.A1" office:value-type="string">
            <text:p text:style-name="Standard">Wed, Jul 8, 12:09 PM (2 days ago)</text:p>
          </table:table-cell>
          <table:table-cell table:style-name="Table41.A1" office:value-type="string">
            <text:p text:style-name="Standard"/>
          </table:table-cell>
          <table:table-cell table:style-name="Table41.A1" table:number-rows-spanned="2" office:value-type="string">
            <text:p text:style-name="Standard"/>
          </table:table-cell>
        </table:table-row>
        <table:table-row table:style-name="Table41.2">
          <table:table-cell table:style-name="Table41.A1" table:number-columns-spanned="3" office:value-type="string">
            <text:p text:style-name="Standard"/>
            <table:table table:name="Table40" table:style-name="Table40">
              <table:table-column table:style-name="Table40.A"/>
              <table:table-row table:style-name="Table40.1">
                <table:table-cell table:style-name="Table40.A1" office:value-type="string">
                  <text:p text:style-name="Standard">to me</text:p>
                  <text:p text:style-name="Standard"><draw:frame draw:style-name="fr1" draw:name="image1.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Is there any way we could do after 1 pm?</text:p>
      <text:p text:style-name="Standard"/>
      <text:p text:style-name="P46">On Jul 8, 2026, at 11:21 AM, DC Top Choice Movers &lt;dctopchoicemovers@gmail.com&gt; wrote:</text:p>
      <text:p text:style-name="Standard"><draw:frame draw:style-name="fr1" draw:name="image20.jpg" text:anchor-type="as-char" svg:width="0.8335in" svg:height="0.8335in" draw:z-index="0"><draw:image xlink:href="Pictures/100000000000005000000050619D9736512D237D.jpg" xlink:type="simple" xlink:show="embed" xlink:actuate="onLoad" loext:mime-type="image/jpeg"/></draw:frame></text:p>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Standard"/>
            <table:table table:name="Table42" table:style-name="Table42">
              <table:table-column table:style-name="Table42.A"/>
              <table:table-row table:style-name="Table42.1">
                <table:table-cell table:style-name="Table42.A1" office:value-type="string">
                  <text:p text:style-name="P50"><text:bookmark text:name="_tqklirin35rp"/><text:span text:style-name="T14">DC Top Choice Movers &lt;dctopchoicemovers@gmail.com&gt;</text:span></text:p>
                </table:table-cell>
              </table:table-row>
            </table:table>
            <text:p text:style-name="Standard"/>
          </table:table-cell>
          <table:table-cell table:style-name="Table44.A1" office:value-type="string">
            <text:p text:style-name="Standard">Wed, Jul 8, 5:45 PM (2 days ago)</text:p>
          </table:table-cell>
          <table:table-cell table:style-name="Table44.A1" office:value-type="string">
            <text:p text:style-name="Standard"/>
          </table:table-cell>
          <table:table-cell table:style-name="Table44.A1" table:number-rows-spanned="2" office:value-type="string">
            <text:p text:style-name="Standard"/>
          </table:table-cell>
        </table:table-row>
        <table:table-row table:style-name="Table44.2">
          <table:table-cell table:style-name="Table44.A1" table:number-columns-spanned="3" office:value-type="string">
            <text:p text:style-name="Standard"/>
            <table:table table:name="Table43" table:style-name="Table43">
              <table:table-column table:style-name="Table43.A"/>
              <table:table-row table:style-name="Table43.1">
                <table:table-cell table:style-name="Table43.A1" office:value-type="string">
                  <text:p text:style-name="Standard">to Chris</text:p>
                  <text:p text:style-name="Standard"><draw:frame draw:style-name="fr1" draw:name="image3.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Confirming your job tomorrow with 3:30-4 pm window of arrival. </text:p>
      <text:p text:style-name="Standard"/>
      <text:p text:style-name="Standard">Below is our advice on pads again, as they are so important to have even if we are just unloading you make sure you have them for your load.</text:p>
      <text:p text:style-name="Standard"/>
      <text:p text:style-name="Standard">Payment:</text:p>
      <text:p text:style-name="Standard">You paid Moving Helper for the time you selected and in return they gave you a “payment code” (6 digits all numbers) for you to give to us. We enter this code on our side to show we have completed your job and get our percentage released to us. If you have it ready to give the guys when they are done helping you we would really appreciate it. It is very easy to retrieve code by calling 1-866-748-4110 and pressing 2 and 1 to hear a recording of the code. Thank you.·</text:p>
      <text:p text:style-name="Standard"/>
      <text:p text:style-name="Standard"><text:s/></text:p>
      <text:p text:style-name="Standard">Pads:</text:p>
      <text:p text:style-name="Standard">Furniture pads, which you can rent when you rent truck then, are very important to protect everything. I recommend counting all your pieces of furniture down to the smallest end table, then add pictures, mirrors and multiply that by 1.25 as some things like the couch and dresser take 2 pads. We can improvise with your blankets, sheets, etc to protect furniture, but everything must be covered to prevent friction damage (scratches) during drive. Always better to have extra pads scratched furniture.</text:p>
      <text:p text:style-name="Standard"><draw:frame draw:style-name="fr1" draw:name="image22.jpg" text:anchor-type="as-char" svg:width="0.8335in" svg:height="0.8335in" draw:z-index="0"><draw:image xlink:href="Pictures/100000000000005000000050619D9736512D237D.jpg" xlink:type="simple" xlink:show="embed" xlink:actuate="onLoad" loext:mime-type="image/jpeg"/></draw:frame></text:p>
      <table:table table:name="Table47" table:style-name="Table47">
        <table:table-column table:style-name="Table47.A"/>
        <table:table-column table:style-name="Table47.B"/>
        <table:table-column table:style-name="Table47.C" table:number-columns-repeated="2"/>
        <text:soft-page-break/>
        <table:table-row table:style-name="Table47.1">
          <table:table-cell table:style-name="Table47.A1" office:value-type="string">
            <text:p text:style-name="Standard"/>
            <table:table table:name="Table45" table:style-name="Table45">
              <table:table-column table:style-name="Table45.A"/>
              <table:table-row table:style-name="Table45.1">
                <table:table-cell table:style-name="Table45.A1" office:value-type="string">
                  <text:p text:style-name="P50"><text:bookmark text:name="_ts6q8zj3hle9"/><text:span text:style-name="T14">DC Top Choice Movers &lt;dctopchoicemovers@gmail.com&gt;</text:span></text:p>
                </table:table-cell>
              </table:table-row>
            </table:table>
            <text:p text:style-name="Standard"/>
          </table:table-cell>
          <table:table-cell table:style-name="Table47.A1" office:value-type="string">
            <text:p text:style-name="Standard">12:29 AM (16 hours ago)</text:p>
          </table:table-cell>
          <table:table-cell table:style-name="Table47.A1" office:value-type="string">
            <text:p text:style-name="Standard"/>
          </table:table-cell>
          <table:table-cell table:style-name="Table47.A1" table:number-rows-spanned="2" office:value-type="string">
            <text:p text:style-name="Standard"/>
          </table:table-cell>
        </table:table-row>
        <table:table-row table:style-name="Table47.2">
          <table:table-cell table:style-name="Table47.A1" table:number-columns-spanned="3" office:value-type="string">
            <text:p text:style-name="Standard"/>
            <table:table table:name="Table46" table:style-name="Table46">
              <table:table-column table:style-name="Table46.A"/>
              <table:table-row table:style-name="Table46.1">
                <table:table-cell table:style-name="Table46.A1" office:value-type="string">
                  <text:p text:style-name="Standard">to Chris</text:p>
                  <text:p text:style-name="Standard"><draw:frame draw:style-name="fr1" draw:name="image13.png" text:anchor-type="as-char" svg:width="0.6945in" svg:height="0.6945in" draw:z-index="0"><draw:image xlink:href="Pictures/1000020100000001000000014C77D75F6DC67A52.png" xlink:type="simple" xlink:show="embed" xlink:actuate="onLoad" loext:mime-type="image/png"/></draw:frame></text:p>
                </table:table-cell>
              </table:table-row>
            </table:table>
            <text:p text:style-name="Standard"/>
          </table:table-cell>
          <table:covered-table-cell/>
          <table:covered-table-cell/>
          <table:covered-table-cell/>
        </table:table-row>
      </table:table>
      <text:p text:style-name="Standard">Thank you so much for trusting us with your move and it may sound unusual but you would be doing us a favor and can help us so much just by doing... nothing. If you could please wait a few days or weeks to review us on moving helper we really really appreciate it! We are doing great booking moves and until we get a 4.5 star review we will have a good early part of this month which is of course the slowest. Anywhere else on the internet we would always love a review and would be so appreciative for the online recommendation but if on moving helper you could please wait at least a few days we would appreciate it so much.</text:p>
      <text:p text:style-name="Standard"/>
      <text:p text:style-name="Standard">Also we really do welcome any input to providing the best possible service to our customers, and if there was any problem please contact for a remedy because if we can make something right we want to do right thing always. Please let us know your experience and advice so we can improve and adapt to all customers needs and wishes without decreasing our work.</text:p>
      <text:p text:style-name="Standard"/>
      <text:p text:style-name="Standard">Anywhere else on the internet a 4.5 star review would show very good service but Moving Helper has a very competitive system where any review other than perfect drops our ranking and eliminates the chance for days, sometimes weeks for us to be near the top of list. Thank you and best of luck to you.</text:p>
      <text:p text:style-name="Standard"/>
      <text:p text:style-name="Standard">--The DC Top Choice Movers Team</text:p>
      <text:p text:style-name="Standard"/>
      <text:p text:style-name="Standard">PS Thanks to the great work of our team we just recently received our 10th 5 star review in a row and will be at top or near top of list potential customers see, so if you could please wait to leave review, as even 5 star review will not help our ranking at all. It would help us so much more in a week as right now nothing can increase our ranking. Even just one 4 star in any category and it will drop our ranking 10-20 spots. <text:s/>Thank you again for your business and we hope we can help you again!</text:p>
      <text:p text:style-name="P4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style:text-underline-style="solid" style:text-underline-width="auto" style:text-underline-color="font-color"/>
    </style:style>
    <style:style style:name="ListLabel_20_84" style:display-name="ListLabel 84" style:family="text">
      <style:text-properties fo:color="#1a75bb" fo:font-size="10.5pt" style:font-size-asian="10.5pt"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7" meta:image-count="30" meta:object-count="0" meta:page-count="8" meta:paragraph-count="369" meta:word-count="4890" meta:character-count="26541" meta:non-whitespace-character-count="21986"/>
    <meta:generator>LibreOfficeDev/6.0.5.2$Linux_X86_64 LibreOffice_project/</meta:generator>
  </office:meta>
</office:document-meta>
</file>